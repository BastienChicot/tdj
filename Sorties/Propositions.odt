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3ee78b" officeooo:paragraph-rsid="001cd6b1" style:font-weight-asian="bold" style:font-weight-complex="bold"/>
    </style:style>
    <style:style style:name="P2" style:family="paragraph" style:parent-style-name="Standard">
      <style:text-properties officeooo:rsid="003ee78b" officeooo:paragraph-rsid="0014fd4d"/>
    </style:style>
    <style:style style:name="P3" style:family="paragraph" style:parent-style-name="Text_20_body">
      <style:text-properties officeooo:paragraph-rsid="001cd6b1"/>
    </style:style>
    <style:style style:name="P4" style:family="paragraph" style:parent-style-name="Standard">
      <style:text-properties officeooo:rsid="0015ef7a" officeooo:paragraph-rsid="001cd6b1"/>
    </style:style>
    <style:style style:name="P5" style:family="paragraph" style:parent-style-name="Text_20_body" style:list-style-name="L1">
      <style:text-properties officeooo:paragraph-rsid="001cd6b1"/>
    </style:style>
    <style:style style:name="P6" style:family="paragraph" style:parent-style-name="Text_20_body">
      <style:text-properties officeooo:rsid="001cd6b1" officeooo:paragraph-rsid="001cd6b1"/>
    </style:style>
    <style:style style:name="P7" style:family="paragraph" style:parent-style-name="Standard">
      <style:text-properties fo:font-style="normal" officeooo:rsid="0015ef7a" officeooo:paragraph-rsid="0015ef7a" style:font-style-asian="normal" style:font-style-complex="normal"/>
    </style:style>
    <style:style style:name="P8" style:family="paragraph" style:parent-style-name="Standard">
      <style:text-properties officeooo:rsid="0015ef7a" officeooo:paragraph-rsid="0015ef7a"/>
    </style:style>
    <style:style style:name="P9" style:family="paragraph" style:parent-style-name="Standard">
      <style:text-properties fo:font-style="normal" officeooo:rsid="00170a4b" officeooo:paragraph-rsid="00170a4b" style:font-style-asian="normal" style:font-style-complex="normal"/>
    </style:style>
    <style:style style:name="P10" style:family="paragraph" style:parent-style-name="Standard">
      <style:text-properties officeooo:rsid="00170a4b" officeooo:paragraph-rsid="00170a4b"/>
    </style:style>
    <style:style style:name="P11" style:family="paragraph" style:parent-style-name="Standard">
      <style:text-properties officeooo:paragraph-rsid="001f6416"/>
    </style:style>
    <style:style style:name="P12" style:family="paragraph" style:parent-style-name="Standard">
      <style:text-properties officeooo:paragraph-rsid="00170a4b"/>
    </style:style>
    <style:style style:name="P13" style:family="paragraph" style:parent-style-name="Standard">
      <style:text-properties fo:font-style="normal" style:text-underline-style="none" officeooo:rsid="0017a0be" officeooo:paragraph-rsid="0017a0be" style:font-style-asian="normal" style:font-style-complex="normal"/>
    </style:style>
    <style:style style:name="P14" style:family="paragraph" style:parent-style-name="Standard">
      <style:text-properties officeooo:paragraph-rsid="0017a0be"/>
    </style:style>
    <style:style style:name="P15" style:family="paragraph" style:parent-style-name="Standard">
      <style:text-properties fo:font-style="normal" officeooo:rsid="0017a0be" officeooo:paragraph-rsid="0017a0be" style:font-style-asian="normal" style:font-style-complex="normal"/>
    </style:style>
    <style:style style:name="P16" style:family="paragraph" style:parent-style-name="Standard">
      <style:text-properties officeooo:rsid="0017a0be" officeooo:paragraph-rsid="0017a0be"/>
    </style:style>
    <style:style style:name="P17" style:family="paragraph" style:parent-style-name="Text_20_body">
      <style:text-properties fo:font-style="normal" officeooo:rsid="0017a0be" officeooo:paragraph-rsid="002125dc" style:font-style-asian="normal" style:font-style-complex="normal"/>
    </style:style>
    <style:style style:name="P18" style:family="paragraph" style:parent-style-name="Text_20_body">
      <style:text-properties officeooo:paragraph-rsid="002125dc"/>
    </style:style>
    <style:style style:name="P19" style:family="paragraph" style:parent-style-name="Standard">
      <style:text-properties style:text-position="0% 100%" officeooo:rsid="0017a0be" officeooo:paragraph-rsid="0017a0be"/>
    </style:style>
    <style:style style:name="P20" style:family="paragraph" style:parent-style-name="Standard">
      <style:text-properties fo:font-weight="bold" officeooo:rsid="003ee78b" officeooo:paragraph-rsid="0017ff18" style:font-weight-asian="bold" style:font-weight-complex="bold"/>
    </style:style>
    <style:style style:name="P21" style:family="paragraph" style:parent-style-name="Standard">
      <style:paragraph-properties fo:break-before="page"/>
      <style:text-properties officeooo:paragraph-rsid="0017ff18"/>
    </style:style>
    <style:style style:name="P22" style:family="paragraph" style:parent-style-name="Standard">
      <style:text-properties style:text-position="0% 100%" fo:font-style="normal" officeooo:rsid="00230ce9" officeooo:paragraph-rsid="00230ce9" style:font-style-asian="normal" style:font-style-complex="normal"/>
    </style:style>
    <style:style style:name="P23" style:family="paragraph" style:parent-style-name="Standard">
      <style:text-properties style:text-position="0% 100%" fo:font-style="normal" officeooo:rsid="00190634" officeooo:paragraph-rsid="00190634" style:font-style-asian="normal" style:font-style-complex="normal"/>
    </style:style>
    <style:style style:name="P24" style:family="paragraph" style:parent-style-name="Text_20_body">
      <style:text-properties officeooo:paragraph-rsid="00230ce9"/>
    </style:style>
    <style:style style:name="P25" style:family="paragraph" style:parent-style-name="Text_20_body">
      <style:text-properties officeooo:rsid="00190634" officeooo:paragraph-rsid="00230ce9"/>
    </style:style>
    <style:style style:name="P26" style:family="paragraph" style:parent-style-name="Standard">
      <style:text-properties officeooo:rsid="0015ef7a" officeooo:paragraph-rsid="00230ce9"/>
    </style:style>
    <style:style style:name="P27" style:family="paragraph" style:parent-style-name="Standard">
      <style:text-properties officeooo:paragraph-rsid="00230ce9"/>
    </style:style>
    <style:style style:name="P28" style:family="paragraph" style:parent-style-name="Text_20_body">
      <style:text-properties fo:font-style="normal" officeooo:rsid="00230ce9" officeooo:paragraph-rsid="00230ce9" style:font-style-asian="normal" style:font-style-complex="normal"/>
    </style:style>
    <style:style style:name="P29" style:family="paragraph" style:parent-style-name="Text_20_body" style:list-style-name="L2">
      <style:text-properties officeooo:paragraph-rsid="00230ce9"/>
    </style:style>
    <style:style style:name="P30" style:family="paragraph" style:parent-style-name="Text_20_body">
      <style:text-properties officeooo:rsid="001a044f" officeooo:paragraph-rsid="00230ce9"/>
    </style:style>
    <style:style style:name="P31" style:family="paragraph" style:parent-style-name="Standard">
      <style:text-properties style:text-position="0% 100%" fo:font-style="normal" officeooo:rsid="00190634" officeooo:paragraph-rsid="00230ce9" style:font-style-asian="normal" style:font-style-complex="normal"/>
    </style:style>
    <style:style style:name="P32" style:family="paragraph" style:parent-style-name="Standard">
      <style:text-properties officeooo:paragraph-rsid="00190634"/>
    </style:style>
    <style:style style:name="P33" style:family="paragraph" style:parent-style-name="Text_20_body">
      <style:text-properties officeooo:paragraph-rsid="00190634"/>
    </style:style>
    <style:style style:name="P34" style:family="paragraph" style:parent-style-name="Text_20_body">
      <style:text-properties officeooo:rsid="001a044f" officeooo:paragraph-rsid="001a044f"/>
    </style:style>
    <style:style style:name="P35" style:family="paragraph" style:parent-style-name="Text_20_body">
      <style:text-properties officeooo:paragraph-rsid="001a044f"/>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font-style="normal" officeooo:rsid="001e6797" style:font-style-asian="normal" style:font-style-complex="normal"/>
    </style:style>
    <style:style style:name="T4" style:family="text">
      <style:text-properties style:text-position="sub 58%" fo:font-style="normal" officeooo:rsid="001e6797"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officeooo:rsid="0030dd42" style:font-style-asian="normal" style:font-style-complex="normal"/>
    </style:style>
    <style:style style:name="T7" style:family="text">
      <style:text-properties fo:font-style="normal" officeooo:rsid="0015ef7a" style:font-style-asian="normal" style:font-style-complex="normal"/>
    </style:style>
    <style:style style:name="T8" style:family="text">
      <style:text-properties fo:font-style="normal" style:text-underline-style="none" officeooo:rsid="00170a4b" style:font-style-asian="normal" style:font-style-complex="normal"/>
    </style:style>
    <style:style style:name="T9" style:family="text">
      <style:text-properties fo:font-style="normal" style:text-underline-style="none" officeooo:rsid="0015ef7a" style:font-style-asian="normal" style:font-style-complex="normal"/>
    </style:style>
    <style:style style:name="T10" style:family="text">
      <style:text-properties fo:font-style="normal" officeooo:rsid="001cd6b1" style:font-style-asian="normal" style:font-style-complex="normal"/>
    </style:style>
    <style:style style:name="T11" style:family="text">
      <style:text-properties officeooo:rsid="001cd6b1"/>
    </style:style>
    <style:style style:name="T12" style:family="text">
      <style:text-properties fo:font-style="normal" officeooo:rsid="00170a4b" style:font-style-asian="normal" style:font-style-complex="normal"/>
    </style:style>
    <style:style style:name="T13" style:family="text">
      <style:text-properties fo:font-style="normal" style:text-underline-style="none" officeooo:rsid="0017a0be" style:font-style-asian="normal" style:font-style-complex="normal"/>
    </style:style>
    <style:style style:name="T14" style:family="text">
      <style:text-properties officeooo:rsid="0017a0be"/>
    </style:style>
    <style:style style:name="T15" style:family="text">
      <style:text-properties style:text-position="0% 100%" fo:font-style="normal" officeooo:rsid="0017a0be" style:font-style-asian="normal" style:font-style-complex="normal"/>
    </style:style>
    <style:style style:name="T16" style:family="text">
      <style:text-properties style:text-position="0% 100%" fo:font-style="normal" style:text-underline-style="none" officeooo:rsid="0015ef7a" style:font-style-asian="normal" style:font-style-complex="normal"/>
    </style:style>
    <style:style style:name="T17" style:family="text">
      <style:text-properties style:text-position="0% 100%" fo:font-style="normal" style:text-underline-style="none" officeooo:rsid="0017a0be" style:font-style-asian="normal" style:font-style-complex="normal"/>
    </style:style>
    <style:style style:name="T18" style:family="text">
      <style:text-properties style:text-position="0% 100%" fo:font-style="normal" style:text-underline-style="none" officeooo:rsid="001e6797"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bold" officeooo:rsid="003ee78b" style:font-style-asian="normal" style:font-weight-asian="bold" style:font-style-complex="normal" style:font-weight-complex="bold"/>
    </style:style>
    <style:style style:name="T21" style:family="text">
      <style:text-properties fo:font-style="normal" style:text-underline-style="none" fo:font-weight="bold" officeooo:rsid="0017ff18" style:font-style-asian="normal" style:font-weight-asian="bold" style:font-style-complex="normal" style:font-weight-complex="bold"/>
    </style:style>
    <style:style style:name="T22" style:family="text">
      <style:text-properties fo:font-style="normal" style:text-underline-style="none" officeooo:rsid="0017ff18" style:font-style-asian="normal" style:font-style-complex="normal"/>
    </style:style>
    <style:style style:name="T23" style:family="text">
      <style:text-properties fo:font-style="normal" officeooo:rsid="0017a0be" style:font-style-asian="normal" style:font-style-complex="normal"/>
    </style:style>
    <style:style style:name="T24" style:family="text">
      <style:text-properties fo:font-style="normal" officeooo:rsid="00190634" style:font-style-asian="normal" style:font-style-complex="normal"/>
    </style:style>
    <style:style style:name="T25" style:family="text">
      <style:text-properties style:text-position="sub 58%" fo:font-style="normal" style:font-style-asian="normal" style:font-style-complex="normal"/>
    </style:style>
    <style:style style:name="T26" style:family="text">
      <style:text-properties fo:font-style="normal" officeooo:rsid="001a044f" style:font-style-asian="normal" style:font-style-complex="normal"/>
    </style:style>
    <style:style style:name="T27" style:family="text">
      <style:text-properties officeooo:rsid="001a044f"/>
    </style:style>
    <style:style style:name="T28" style:family="text">
      <style:text-properties officeooo:rsid="00190634"/>
    </style:style>
    <style:style style:name="T29" style:family="text">
      <style:text-properties officeooo:rsid="00230ce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ition 1 : <text:span text:style-name="Strong_20_Emphasis">Seuil individuel et sélection par la réactance.</text:span></text:p>
      <text:p text:style-name="P2"/>
      <text:p text:style-name="P3">Soit un agent <text:span text:style-name="T1">i</text:span> caractérisé par une motivation intrinsèque V<text:span text:style-name="T2">i</text:span>​ et un paramètre de sensibilité à l’autonomie <text:span text:style-name="T3">θ</text:span><text:span text:style-name="T4">i</text:span>≥0.</text:p>
      <text:p text:style-name="P3">Pour tout niveau d’intensité du nudge n ≥ 0, il existe un seuil d’adoption :</text:p>
      <text:p text:style-name="P4"><text:span text:style-name="T5">S(n,</text:span><text:span text:style-name="T3">θ</text:span><text:span text:style-name="T4">i</text:span><text:span text:style-name="T5">) = </text:span><text:span text:style-name="T6">c – </text:span><text:span text:style-name="T3">ø</text:span><text:span text:style-name="T6">(n) + </text:span><text:span text:style-name="T3">θ</text:span><text:span text:style-name="T4">i</text:span><text:span text:style-name="T6">tanh(n/T)</text:span></text:p>
      <text:p text:style-name="P4"><text:span text:style-name="T6"/></text:p>
      <text:p text:style-name="P3">tel que l’agent adopte l’action si et seulement si :</text:p>
      <text:p text:style-name="P3">V<text:span text:style-name="T2">i </text:span>≥ <text:span text:style-name="T7">S(n,</text:span><text:span text:style-name="T3">θ</text:span><text:span text:style-name="T4">i</text:span><text:span text:style-name="T7">)</text:span> </text:p>
      <text:p text:style-name="P3">De plus, il existe un seuil critique de sensibilité :</text:p>
      <text:p text:style-name="P3">θˉ(n) = <text:span text:style-name="T8">( </text:span><text:span text:style-name="T9">γ</text:span><text:span text:style-name="T8">T)/ [(1+n)(1−tanh</text:span><text:span text:style-name="T9">²</text:span><text:span text:style-name="T8">(n/T)]</text:span></text:p>
      <text:p text:style-name="P3">tel que :</text:p>
      <text:list text:style-name="L1">
        <text:list-item>
          <text:p text:style-name="P5">si θ<text:span text:style-name="T2">i </text:span>&lt; θˉ(n), l’effet marginal du nudge est favorable à l’adoption ;</text:p>
        </text:list-item>
        <text:list-item>
          <text:p text:style-name="P5">si θ<text:span text:style-name="T2">i </text:span>&gt; θˉ(n), l’effet marginal du nudge devient défavorable pour l’agent.</text:p>
        </text:list-item>
      </text:list>
      <text:p text:style-name="P3">Ainsi, le modèle génère un mécanisme endogène de tri comportemental :<text:line-break/>à mesure que n augmente, les agents faiblement sensibles à l’autonomie restent dans la population des adoptants, tandis que les agents fortement réactifs peuvent en sortir.</text:p>
      <text:p text:style-name="P6">a. Preuve</text:p>
      <text:p text:style-name="P3">On dérive le seuil d’adoption par rapport à n :</text:p>
      <text:p text:style-name="P3"><text:span text:style-name="T7">∂S/∂n = </text:span><text:span text:style-name="T5">−</text:span><text:span text:style-name="T7">(γ/(</text:span><text:span text:style-name="T5">1+n</text:span><text:span text:style-name="T7">))</text:span><text:span text:style-name="T5">+</text:span><text:span text:style-name="T7">(</text:span><text:span text:style-name="T5">θi/</text:span><text:span text:style-name="T7">T)</text:span><text:span text:style-name="T5">(1−tanh</text:span><text:span text:style-name="T7">²</text:span><text:span text:style-name="T5">(n/T)) </text:span></text:p>
      <text:p text:style-name="P3">Le premier terme est négatif (effet matériel du nudge).<text:line-break/>Le second est positif (coût psychologique marginal).</text:p>
      <text:p text:style-name="P3">L’effet marginal du nudge sur le seuil est donc négatif si et seulement si :</text:p>
      <text:p text:style-name="P3"><text:span text:style-name="T7">(</text:span><text:span text:style-name="T5">θi/</text:span><text:span text:style-name="T7">T)</text:span><text:span text:style-name="T5">(1−tanh</text:span><text:span text:style-name="T7">²</text:span><text:span text:style-name="T5">(n/T)) </text:span>&lt; <text:span text:style-name="T7">γ/(</text:span><text:span text:style-name="T5">1+n</text:span><text:span text:style-name="T7">)</text:span></text:p>
      <text:p text:style-name="P3">ce qui définit le seuil critique θˉ(n).</text:p>
      <text:p text:style-name="P6">b. Discussion</text:p>
      <text:p text:style-name="P4"><text:span text:style-name="T10">L</text:span><text:span text:style-name="T5">e seuil S(n,</text:span><text:span text:style-name="T3">θ</text:span><text:span text:style-name="T4">i</text:span><text:span text:style-name="T5">) représente le niveau de motivation intrinsèque minimum de l’agent i pour qu’il adopte l’action. Ainsi, plus le seuil est élevé, plus l’adoption est difficile. </text:span><text:span text:style-name="T10"><text:s/>Deux effets impactent ce seuil :</text:span></text:p>
      <text:p text:style-name="P7"/>
      <text:p text:style-name="P7"><text:tab/>b.<text:span text:style-name="T11">1</text:span>. L’effet matériel (positif pour l’adoption) −(γ/(1+n))</text:p>
      <text:p text:style-name="P8"><text:span text:style-name="T5"/></text:p>
      <text:p text:style-name="P8"><text:span text:style-name="T5">Cet effet agit positivement sur l’adoption </text:span><text:span text:style-name="T12">(signe négatif) en réduisant le seuil. Il représente l’effet du Nudge ou de la politique publique qui vient diminuer les coût et les effets des freins sur les agents rendant l’action plus accessible, moins chronophage, etc...</text:span></text:p>
      <text:p text:style-name="P9">Cet effet décroît avec n. Lorsque n est grand, c’est à dire, lorsque le nudge est plus fort, son effet positif est de moins en moins grand symbolisant les rendements décroissants de la politique publique ou du nudge.</text:p>
      <text:p text:style-name="P10"><text:span text:style-name="T5"/></text:p>
      <text:p text:style-name="P10"><text:span text:style-name="T5"><text:tab/>b.</text:span><text:span text:style-name="T10">2.</text:span><text:span text:style-name="T5"> L’effet psychologique (négatif pour l’adoption) </text:span><text:span text:style-name="T7">(</text:span><text:span text:style-name="T5">θi/</text:span><text:span text:style-name="T7">T)</text:span><text:span text:style-name="T5">(1−tanh</text:span><text:span text:style-name="T7">²</text:span><text:span text:style-name="T5">(n/T)) </text:span></text:p>
      <text:p text:style-name="P10"><text:soft-page-break/><text:span text:style-name="T5"/></text:p>
      <text:p text:style-name="P9">Cet effet au signe positif a un effet inverse sur le seuil, il augmente le seuil et représente les effets intrinsèques à l’agent (sa confiance en l’état, sa réactance etc.).</text:p>
      <text:p text:style-name="P11"><text:span text:style-name="T12">Cet effet dépend de chaque individu et de son tempérament. </text:span>La réactance est borné et décroît lorsque n augmente, bien que le niveau total de réactance converge vers <text:span text:style-name="T12">θi, c’est à dire que plus la politique publique ou le nudge est fort moins cet effet a d’impact.</text:span></text:p>
      <text:p text:style-name="P9"/>
      <text:p text:style-name="P10"><text:span text:style-name="T5"/></text:p>
      <text:p text:style-name="P12"><text:span text:style-name="T12">Le résultat de cette première proposition est l’existence d’un seuil de réactance. </text:span><text:span text:style-name="T8">Pour un niveau donné de n </text:span><text:span text:style-name="T13">l</text:span>es agents avec θi&gt;θˉ(n) subissent un effet marginal négatif du nudge <text:span text:style-name="T14">i.e. l</text:span>e nudge devient contre-productif pour eux.</text:p>
      <text:p text:style-name="P13"/>
      <text:p text:style-name="P13">On en déduit la chose suivante : </text:p>
      <text:p text:style-name="P14"><text:span text:style-name="T13">- </text:span>Le seuil critique θ̄(n) définit une frontière dans l’espace des types.<text:line-break/>L’augmentation de n modifie la composition des adoptants en excluant progressivement les agents à forte sensibilité. </text:p>
      <text:p text:style-name="P15">Le modèle génère un tri comportemental endogène.</text:p>
      <text:p text:style-name="P16"><text:span text:style-name="T5"/></text:p>
      <text:p text:style-name="P15"><text:span text:style-name="T11">c</text:span>. Analyse des cas limites</text:p>
      <text:p text:style-name="P16"><text:span text:style-name="T5"/></text:p>
      <text:p text:style-name="P17">Quand n → 0 : modèle standard coût–motivation</text:p>
      <text:p text:style-name="P18">Quand n → ∞ : modèle dominé par la réactance</text:p>
      <text:p text:style-name="P19"><text:span text:style-name="T5"/></text:p>
      <text:p text:style-name="P14"><text:span text:style-name="T15">Notre modèle montre que l’effet du nudge dépend des paramètres (</text:span><text:span text:style-name="T16">γ, </text:span><text:span text:style-name="T17">T) c’est à dire des rendements de l’action publique et de la confiance des agents dans les institutions. Il va également dépendre de la distribution </text:span><text:span text:style-name="T18">θi. </text:span><text:span text:style-name="T17">L’inefficacité potentielle n’est pas automatique et chaque agent a son propre point de bascule (seuil S). La Proposition 1 établit que l’intensification d’un nudge ne modifie pas uniquement le niveau d’adoption, mais également la composition des adoptants. </text:span></text:p>
      <text:p text:style-name="P19"><text:span text:style-name="T19"/></text:p>
      <text:p text:style-name="P19"><text:span text:style-name="T19"/></text:p>
      <text:p text:style-name="P19"><text:span text:style-name="T19"/></text:p>
      <text:p text:style-name="P20"><text:span text:style-name="T19"/></text:p>
      <text:p text:style-name="P21"><text:span text:style-name="T20">Proposition </text:span><text:span text:style-name="T21">2</text:span><text:span text:style-name="T20"> : </text:span><text:span text:style-name="T22">Évolution agrégée de l’adoption </text:span></text:p>
      <text:p text:style-name="P19"><text:span text:style-name="T5"/></text:p>
      <text:p text:style-name="P22">Soit la part des agents qui adoptent une action :</text:p>
      <text:p text:style-name="P23"/>
      <text:p text:style-name="P24">P(n) = P( V<text:span text:style-name="T2">i</text:span> ≥ S(n, θ<text:span text:style-name="T2">i</text:span>) )</text:p>
      <text:p text:style-name="P25">Avec un seuil déjà connu :</text:p>
      <text:p text:style-name="P26"><text:span text:style-name="T5">S(n,</text:span><text:span text:style-name="T3">θ</text:span><text:span text:style-name="T4">i</text:span><text:span text:style-name="T5">) = </text:span><text:span text:style-name="T6">c – </text:span><text:span text:style-name="T3">ø</text:span><text:span text:style-name="T6">(n) + </text:span><text:span text:style-name="T3">θ</text:span><text:span text:style-name="T4">i</text:span><text:span text:style-name="T6">tanh(n/T)</text:span></text:p>
      <text:p text:style-name="P26"><text:span text:style-name="T6"/></text:p>
      <text:p text:style-name="P27"><text:span text:style-name="T23">D</text:span><text:span text:style-name="T24">ans la partie précédente nous avons démontré que :</text:span></text:p>
      <text:p text:style-name="P27"><text:span text:style-name="T24"/></text:p>
      <text:p text:style-name="P24"><text:span text:style-name="T7">∂S/∂n = </text:span><text:span text:style-name="T5">−</text:span><text:span text:style-name="T7">(γ/(</text:span><text:span text:style-name="T5">1+n</text:span><text:span text:style-name="T7">))</text:span><text:span text:style-name="T5">+</text:span><text:span text:style-name="T7">(</text:span><text:span text:style-name="T5">θi/</text:span><text:span text:style-name="T7">T)</text:span><text:span text:style-name="T5">(1−tanh</text:span><text:span text:style-name="T7">²</text:span><text:span text:style-name="T5">(n/T)) </text:span></text:p>
      <text:p text:style-name="P28">a. Preuve</text:p>
      <text:p text:style-name="P28">On dérive l’expression P(n) :</text:p>
      <text:p text:style-name="P24"><text:span text:style-name="T7">∂</text:span><text:span text:style-name="T5">P/</text:span><text:span text:style-name="T7">∂</text:span><text:span text:style-name="T5">n = − E[ f</text:span><text:span text:style-name="T25">V</text:span><text:span text:style-name="T5">(S(n,θ</text:span><text:span text:style-name="T25">i</text:span><text:span text:style-name="T5">)) · </text:span><text:span text:style-name="T7">∂</text:span><text:span text:style-name="T5">S/</text:span><text:span text:style-name="T7">∂</text:span><text:span text:style-name="T5">n ]</text:span></text:p>
      <text:p text:style-name="P24">Le signe de <text:span text:style-name="T7">∂</text:span>P/<text:span text:style-name="T7">∂</text:span>n est donc l’opposé du signe moyen de <text:span text:style-name="T7">∂</text:span>S/<text:span text:style-name="T7">∂</text:span>n.</text:p>
      <text:p text:style-name="P24">Ainsi :</text:p>
      <text:list text:style-name="L2">
        <text:list-item>
          <text:p text:style-name="P29">Si <text:span text:style-name="T7">∂</text:span><text:span text:style-name="T26">S/</text:span><text:span text:style-name="T7">∂</text:span>n &lt; 0 en moyenne → P(n) augmente</text:p>
        </text:list-item>
        <text:list-item>
          <text:p text:style-name="P29"><text:span text:style-name="T5">Si </text:span><text:span text:style-name="T7">∂</text:span><text:span text:style-name="T5">S/</text:span><text:span text:style-name="T7">∂</text:span><text:span text:style-name="T5">n &gt; 0 en moyenne → P(n) diminue</text:span></text:p>
        </text:list-item>
      </text:list>
      <text:p text:style-name="P30">b. Condition de retournement</text:p>
      <text:p text:style-name="P24"><text:span text:style-name="T27">Ici nous montrons le moment où </text:span>P(n) commence à diminuer :</text:p>
      <text:p text:style-name="P24"><text:span text:style-name="T5">E[ (θ</text:span><text:span text:style-name="T25">i</text:span><text:span text:style-name="T5"> / T) · (1 − tanh²(n/T)) ] &gt; γ/(1+n)</text:span></text:p>
      <text:p text:style-name="P24"><text:span text:style-name="T5"/></text:p>
      <text:p text:style-name="P28">c.Discussion</text:p>
      <text:p text:style-name="P31">Après avoir étudié le seuil de chaque agent et déduis que celui-ci est composé de deux parties, la partie matériel qui est la même pour tous et la partie psychologique qui est propre à chacun en fonction de sa réactance et de sa confiance dans les institutions, nous proposons une analyse de la probabilité d’adoption sur l’ensemble des agents.</text:p>
      <text:p text:style-name="P32"><text:span text:style-name="T6">L</text:span><text:span text:style-name="T24">orsque le seuil augmente, il est plus difficile d’adopter la politique publique et, par conséquent, P(n) diminue.</text:span></text:p>
      <text:p text:style-name="P33"><text:span text:style-name="T24"/></text:p>
      <text:p text:style-name="P33"><text:span text:style-name="T28">Pour l’effet matériel (qui est pro-adoption) défini par </text:span>) − γ/(1+n), <text:span text:style-name="T28">il a été établi qu’il</text:span> réduit le seuil <text:span text:style-name="T28">et donc</text:span> favorise l’adoption. <text:span text:style-name="T28">Par contre, cet effet</text:span> décroît avec n.</text:p>
      <text:p text:style-name="P33"><text:span text:style-name="T28">A l’inverse, l’e</text:span>ffet psychologique (anti-adoption) <text:span text:style-name="T28">défini par </text:span><text:span text:style-name="T7">(</text:span><text:span text:style-name="T24">θi/</text:span><text:span text:style-name="T7">T)</text:span><text:span text:style-name="T24">(1−tanh</text:span><text:span text:style-name="T7">²</text:span><text:span text:style-name="T24">(n/T)) </text:span>augmente le seuil. <text:span text:style-name="T28">Cet effet </text:span>dépend du type d’agent <text:span text:style-name="T28">et de sa nature à réagir aux politiques publiques de manière négative mais aussi de sa confiance en l’état ou l’organisme qui déploie l’action. Cet effet est </text:span>borné mais significatif.</text:p>
      <text:p text:style-name="Text_20_body"/>
      <text:p text:style-name="P34"><text:span text:style-name="T29">d</text:span>. Lecture économique</text:p>
      <text:p text:style-name="P34"><text:soft-page-break/>Comment interpréter économiquement l’évolution du modèle et son impact sur la part de la population qui adopte l’action ou le comportement visé par le nudge.</text:p>
      <text:p text:style-name="P35">Au départ, <text:span text:style-name="T27">nous avons un </text:span>n faible, <text:span text:style-name="T27">c’est à dire une effet faible de la politique publique ou nudge sur la population. Par conséquent c’est </text:span><text:span text:style-name="T3">ø</text:span><text:span text:style-name="T6">(n) </text:span><text:span text:style-name="T26">qui domine et le seuil baisse pour les agents. Avec ces conditions, nous avons une part d’adoption (P(n)) qui augmente.</text:span></text:p>
      <text:p text:style-name="Text_20_body"><text:span text:style-name="T27">Ensuite, p</text:span>our n plus élevé, <text:span text:style-name="T27">autrement dit, une politique publique ou un nudge plus présent et qui se veut plus fort sur la population c’est </text:span>tanh(n/T) <text:span text:style-name="T27">qui</text:span> devient important, <text:span text:style-name="T27">c’est à dire la fonction de confiance dans les institutions. L</text:span>es agents à forte <text:span text:style-name="T27">réactance (</text:span>θ<text:span text:style-name="T2">i</text:span><text:span text:style-name="T27">)</text:span> sont découragés, <text:span text:style-name="T27">nous observons un </text:span>effet de sélection <text:span text:style-name="T27">dans la population qui se scinde en deux groupes : ceux qui adoptent l’action et ceux qui sont contre. Cette évolution est progressive et non brutale, les agents passant un à un du groupe des adoptants à celui des réactants.</text:span></text:p>
      <text:p text:style-name="Text_20_body"><text:span text:style-name="T27">Dans le cas où</text:span> la sensibilité moyenne à l’autonomie est suffisamment forte <text:span text:style-name="T27">la part d’adoptants (</text:span>P(n)<text:span text:style-name="T27">)</text:span> peut atteindre un maximum puis diminuer <text:span text:style-name="T27">petit à petit.</text:span></text:p>
      <text:p text:style-name="P35">La non-monotonie de P(n) n’est pas automatique <text:span text:style-name="T27">et </text:span>dépend <text:span text:style-name="T27">de l’efficacité matérielle du nudge (</text:span>γ), <text:span text:style-name="T27">de la confiance institutionnelle (</text:span>T), de la distribution de <text:span text:style-name="T27">la réactance dans la population (</text:span>θ<text:span text:style-name="T2">i</text:span>) <text:span text:style-name="T27">et de </text:span>l’hétérogénéité des motivations <text:span text:style-name="T27">(</text:span>V<text:span text:style-name="T2">i</text:span><text:span text:style-name="T27">).</text:span></text:p>
      <text:p text:style-name="Text_20_body"><text:span text:style-name="T27">Notre</text:span> modèle montre que l’inefficacité potentielle d’un nudge est une propriété structurelle liée à l’hétérogénéité comportementale.</text:p>
      <text:p text:style-name="P8"><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3T16:19:29.693000000</meta:creation-date>
    <dc:date>2026-03-09T16:18:53.285000000</dc:date>
    <meta:editing-duration>PT1H22S</meta:editing-duration>
    <meta:editing-cycles>13</meta:editing-cycles>
    <meta:generator>LibreOffice/24.8.0.3$Windows_X86_64 LibreOffice_project/0bdf1299c94fe897b119f97f3c613e9dca6be583</meta:generator>
    <meta:document-statistic meta:table-count="0" meta:image-count="0" meta:object-count="0" meta:page-count="4" meta:paragraph-count="64" meta:word-count="1110" meta:character-count="6634" meta:non-whitespace-character-count="5542"/>
  </office:meta>
</office:document-meta>
</file>