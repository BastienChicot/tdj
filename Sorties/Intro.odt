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0270" officeooo:paragraph-rsid="00180270"/>
    </style:style>
    <style:style style:name="P2" style:family="paragraph" style:parent-style-name="Text_20_body">
      <style:text-properties officeooo:rsid="00180270" officeooo:paragraph-rsid="00180270"/>
    </style:style>
    <style:style style:name="P3" style:family="paragraph" style:parent-style-name="Text_20_body">
      <style:text-properties officeooo:rsid="00180270" officeooo:paragraph-rsid="002af740"/>
    </style:style>
    <style:style style:name="P4" style:family="paragraph" style:parent-style-name="Text_20_body">
      <style:text-properties officeooo:paragraph-rsid="002b6a9e"/>
    </style:style>
    <style:style style:name="P5" style:family="paragraph" style:parent-style-name="Text_20_body">
      <style:text-properties officeooo:paragraph-rsid="0019f9e5"/>
    </style:style>
    <style:style style:name="P6" style:family="paragraph" style:parent-style-name="Text_20_body">
      <style:text-properties officeooo:paragraph-rsid="002d94f3"/>
    </style:style>
    <style:style style:name="P7" style:family="paragraph" style:parent-style-name="Text_20_body">
      <style:text-properties officeooo:paragraph-rsid="002f9203"/>
    </style:style>
    <style:style style:name="P8" style:family="paragraph" style:parent-style-name="Text_20_body">
      <style:text-properties officeooo:rsid="001b2136" officeooo:paragraph-rsid="002c5bde"/>
    </style:style>
    <style:style style:name="P9" style:family="paragraph" style:parent-style-name="Text_20_body">
      <style:text-properties officeooo:paragraph-rsid="002c5bde"/>
    </style:style>
    <style:style style:name="P10" style:family="paragraph" style:parent-style-name="Standard">
      <style:text-properties officeooo:rsid="001f2961" officeooo:paragraph-rsid="001f2961"/>
    </style:style>
    <style:style style:name="T1" style:family="text">
      <style:text-properties officeooo:rsid="001f2961"/>
    </style:style>
    <style:style style:name="T2" style:family="text">
      <style:text-properties officeooo:rsid="002af740"/>
    </style:style>
    <style:style style:name="T3" style:family="text">
      <style:text-properties officeooo:rsid="0023fd50"/>
    </style:style>
    <style:style style:name="T4" style:family="text">
      <style:text-properties officeooo:rsid="001e05c8"/>
    </style:style>
    <style:style style:name="T5" style:family="text">
      <style:text-properties officeooo:rsid="001c5763"/>
    </style:style>
    <style:style style:name="T6" style:family="text">
      <style:text-properties officeooo:rsid="0019f9e5"/>
    </style:style>
    <style:style style:name="T7" style:family="text">
      <style:text-properties officeooo:rsid="002b6a9e"/>
    </style:style>
    <style:style style:name="T8" style:family="text">
      <style:text-properties fo:font-weight="normal" officeooo:rsid="0019f9e5" style:font-weight-asian="normal" style:font-weight-complex="normal"/>
    </style:style>
    <style:style style:name="T9" style:family="text">
      <style:text-properties officeooo:rsid="001b12c0"/>
    </style:style>
    <style:style style:name="T10" style:family="text">
      <style:text-properties officeooo:rsid="00299f29"/>
    </style:style>
    <style:style style:name="T11" style:family="text">
      <style:text-properties officeooo:rsid="001b2136"/>
    </style:style>
    <style:style style:name="T12" style:family="text">
      <style:text-properties officeooo:rsid="002c5bde"/>
    </style:style>
    <style:style style:name="T13" style:family="text">
      <style:text-properties officeooo:rsid="002fee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2"/>
      <text:p text:style-name="P3"><text:span text:style-name="T1">Les politiques publiques mobilisent depuis longtemps un large éventail d’instruments visant à orienter les comportements individuels dans un sens jugé socialement désirable. </text:span><text:span text:style-name="T2">U</text:span>ne grande majorité <text:span text:style-name="T2">de celles-ci sont</text:span><text:span text:style-name="T1"> fondées sur des règles contraignantes assorties de sanctions ou d’incitations financières explicites. </text:span><text:span text:style-name="T2">Cependant, i</text:span>l existe <text:span text:style-name="T3">aussi</text:span> des <text:span text:style-name="T4">approches mettant en œuvre des </text:span>mécanismes <text:span text:style-name="T4">issus</text:span> <text:span text:style-name="T4">de</text:span> la recherche en sciences comportementales qui s’appuient sur les biais cognitifs des agents pour les guider sans les contraindre vers une action : les Nudges ou paternalisme libertarien. <text:span text:style-name="T2">Popularisés par</text:span> Richard H. Thaler et Cass <text:span text:style-name="T5">R. </text:span>Sunstein <text:span text:style-name="T2">les </text:span>« Nudge<text:span text:style-name="T2">s</text:span> » <text:span text:style-name="T2">se veulent être d</text:span>es mécanismes dans l<text:span text:style-name="T2">esq</text:span>uel<text:span text:style-name="T2">s</text:span> les libertés sont préservées et les bonnes décisions sont intelligemment suggérées. </text:p>
      <text:p text:style-name="P3"/>
      <text:p text:style-name="P4">De nombreux travaux empiriques ont montré que ces dispositifs pouvaient, dans certains contextes, améliorer significativement les taux d’adoption de comportements jugés souhaitables. Toutefois, <text:span text:style-name="T6"><text:s/>nous avons </text:span><text:span text:style-name="T7">aujourd’hui </text:span><text:span text:style-name="T6">suffisamment de recul pour remettre en question l’efficacité de ces mécanismes.</text:span> <text:span text:style-name="T7">U</text:span>n constat récurrent s’impose : les effets des nudges apparaissent souvent hétérogènes, limités dans le temps, voire contre-productifs pour une partie de la population. Dans plusieurs cas, l’introduction d’un nudge s’accompagne d’un phénomène de rejet ou de résistance active, y compris lorsque l’action recommandée est peu coûteuse individuellement et bénéfique collectivement. Ce constat soulève une question centrale : <text:span text:style-name="Strong_20_Emphasis">pourquoi des dispositifs conçus pour préserver la liberté de choix génèrent-ils néanmoins une opposition persistante et parfois croissante ?</text:span></text:p>
      <text:p text:style-name="P5"><text:span text:style-name="Strong_20_Emphasis"><text:span text:style-name="T8">De nombreux travaux ont, par ailleurs, tentés de modéliser et de comprendre tout ou partie des biais qui viennent perturber le bon fonctionnement des nudges. Par exemple, nous savons que les individus ne maximisent pas uniquement une utilité matérielle, mais cherchent également à agir en cohérence avec une image de soi ou une appartenance sociale donnée (Akerlof et Kranton). Dans cette perspective, suivre une recommandation externe peut être perçu comme incompatible avec certaines identités, réduisant ainsi l’attrait de l’action proposée. D’autres contributions soulignent le rôle des incitations et de la réputation dans les comportements prosociaux : une intervention externe peut modifier la signification morale d’une action et en réduire la motivation intrinsèque, phénomène souvent qualifié de </text:span></text:span><text:span text:style-name="Emphasis"><text:span text:style-name="T8">crowding-out</text:span></text:span><text:span text:style-name="Strong_20_Emphasis"><text:span text:style-name="T8"> (Bénabou et Tirole). Enfin, des travaux expérimentaux mettent en évidence qu’un Nudge peut aussi être un signal de contrôle et être interprété négativement par un agent pour qui la liberté de choix est importante. Toute forme de contrôle représente un coût supplémentaire qui vient contrebalancer les bénéfices retirés d’un acte ou d’une décision (Falk et Kosfeld).</text:span></text:span></text:p>
      <text:p text:style-name="P4"><text:span text:style-name="T7">Plus récemment,</text:span><text:span text:style-name="T9"> Lowenstein et Chater font état de l’approche individualiste de certaines politiques publiques comme les Nudges. Ils présentent ce type d’outils comme des mécanismes qui responsabilisent trop les agents sans pour autant, leur expliquer en quoi leur décision à un impact à une échelle plus grande. C’est la différence entre ce qu’ils appellent le i-frame (pour individuel, qui culpabilise plus l’agent qu’autre chose) et le s-frame (pour syst</text:span><text:span text:style-name="T10">è</text:span><text:span text:style-name="T9">m</text:span><text:span text:style-name="T10">e</text:span><text:span text:style-name="T9">, qui donne les raisons du besoin de changement systémique </text:span><text:span text:style-name="T1">et qui impacte la société dans son ensemble et plus seulement les agents un à un</text:span><text:span text:style-name="T9">).</text:span> L’ensemble de ces travaux converge vers une idée commune : <text:span text:style-name="Strong_20_Emphasis">les interventions </text:span><text:soft-page-break/><text:span text:style-name="Strong_20_Emphasis">comportementales peuvent générer des coûts psychologiques endogènes, induits par l’intervention elle-même</text:span>, et non uniquement par l’action recommandée.</text:p>
      <text:p text:style-name="P6"><text:span text:style-name="T9">Tous ces freins au bon fonctionnement des politiques publiques peuvent être intégrer à la notion de réactance </text:span><text:span text:style-name="T1">introduite</text:span><text:span text:style-name="T9"> par Brehm en 1966 et qui représente les motivations pour lesquelles des agents pourraient être amenés à ne pas se conformer à certaines actions. Cette notion de réactance nous permet </text:span><text:span text:style-name="T7">d’affirmer</text:span><text:span text:style-name="T9"> que ces agents </text:span>restent rationnels au sens de la maximisation d’une utilité élargie<text:span text:style-name="T9">. </text:span><text:span text:style-name="T7">C</text:span><text:span text:style-name="T1">es coûts apparaissent comme rationnels si nous considérons que chaque agent d’une population avec des préférences hétérogènes, cherche à maximiser son utilité en prenant en compte tous les éléments exogènes.</text:span></text:p>
      <text:p text:style-name="P7"><text:span text:style-name="T11">Tous ces travaux ont permis de mettre en lumière différents problèmes pouvant affecter les politiques publiques. </text:span>À notre connaissance, il n’existe pas de cadre formel unifié permettant d’analyser conjointement identité, contrôle perçu et réactance dans l’évaluation de l’efficacité des nudges.<text:span text:style-name="T11"> </text:span><text:span text:style-name="T1">Il nous paraît pertinent de joindre l’aspect psychologique qui altèrent les coûts liés à une décision dans une population et l’aspect économique sur la pertinence et la réussite d’une politique publique.</text:span></text:p>
      <text:p text:style-name="P8">Dans cet article, nous <text:span text:style-name="T7">proposons un</text:span> mod<text:span text:style-name="T7">è</text:span>l<text:span text:style-name="T7">e</text:span> <text:span text:style-name="T7">formel autour d</text:span>es décisions des agents <text:span text:style-name="T7">en </text:span>intégrant la réactance comme fonction liée à l’autonomie et à la confiance institutionnelle. Les agents sont hétérogènes dans leur sensibilité <text:span text:style-name="T12">aux</text:span> coût<text:span text:style-name="T12">s liés à une politique publique</text:span>, lequel dépend notamment de l’intensité de l’intervention et de facteurs institutionnels tels que la confiance. </text:p>
      <text:p text:style-name="P9"><text:span text:style-name="T11">A travers ce modèle, nous </text:span><text:span text:style-name="T12">montrons</text:span><text:span text:style-name="T11"> comment réagit un groupe en fonction de la force de la réactance et des éléments qui l’a compose, ainsi, nous </text:span><text:span text:style-name="T12">observons</text:span><text:span text:style-name="T11"> l’application et les probabilités de réussite d’une politique publique. Nous </text:span><text:span text:style-name="T12">mobilisons ensuite le modèle dans un cadre de la théorie des jeux afin d’</text:span><text:span text:style-name="T13">analyser</text:span><text:span text:style-name="T12"> </text:span>l’interaction entre une autorité publique et une population d’agents hétérogènes. </text:p>
      <text:p text:style-name="P9">Ces résultats apportent des implications importantes pour la conception des politiques publiques et invitent à repenser le rôle et les limites des nudges dans des contextes caractérisés par une forte hétérogénéité des préférences et des perceptions.</text:p>
      <text:p text:style-name="P4"/>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6T17:07:37.997000000</meta:creation-date>
    <dc:date>2026-01-28T17:36:37.218000000</dc:date>
    <meta:editing-duration>PT1H32M55S</meta:editing-duration>
    <meta:editing-cycles>15</meta:editing-cycles>
    <meta:generator>LibreOffice/24.8.0.3$Windows_X86_64 LibreOffice_project/0bdf1299c94fe897b119f97f3c613e9dca6be583</meta:generator>
    <meta:document-statistic meta:table-count="0" meta:image-count="0" meta:object-count="0" meta:page-count="2" meta:paragraph-count="10" meta:word-count="839" meta:character-count="5794" meta:non-whitespace-character-count="4961"/>
  </office:meta>
</office:document-meta>
</file>