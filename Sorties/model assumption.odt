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5a0fb" officeooo:paragraph-rsid="003c23c5"/>
    </style:style>
    <style:style style:name="P2" style:family="paragraph" style:parent-style-name="Standard">
      <style:text-properties officeooo:rsid="0035a0fb" officeooo:paragraph-rsid="0035a0fb"/>
    </style:style>
    <style:style style:name="P3" style:family="paragraph" style:parent-style-name="Standard">
      <style:text-properties officeooo:rsid="0030f353" officeooo:paragraph-rsid="0030f353"/>
    </style:style>
    <style:style style:name="P4" style:family="paragraph" style:parent-style-name="Standard">
      <style:paragraph-properties fo:text-align="center" style:justify-single-word="false"/>
      <style:text-properties fo:font-size="16pt" fo:font-weight="bold" officeooo:rsid="00208b46" officeooo:paragraph-rsid="0035a0fb" style:font-size-asian="16pt" style:font-weight-asian="bold" style:font-size-complex="16pt" style:font-weight-complex="bold"/>
    </style:style>
    <style:style style:name="P5" style:family="paragraph" style:parent-style-name="Standard">
      <style:text-properties officeooo:rsid="001e6797" officeooo:paragraph-rsid="0035a0fb"/>
    </style:style>
    <style:style style:name="P6" style:family="paragraph" style:parent-style-name="Standard" style:list-style-name="L1">
      <style:text-properties officeooo:rsid="00252e95" officeooo:paragraph-rsid="0035a0fb"/>
    </style:style>
    <style:style style:name="P7" style:family="paragraph" style:parent-style-name="Standard" style:list-style-name="L1">
      <style:text-properties officeooo:paragraph-rsid="0035a0fb"/>
    </style:style>
    <style:style style:name="P8" style:family="paragraph" style:parent-style-name="Text_20_body" style:list-style-name="L1">
      <style:paragraph-properties fo:margin-top="0cm" fo:margin-bottom="0cm" style:contextual-spacing="false"/>
      <style:text-properties officeooo:paragraph-rsid="0035a0fb"/>
    </style:style>
    <style:style style:name="P9" style:family="paragraph" style:parent-style-name="Standard" style:list-style-name="L1">
      <style:text-properties officeooo:rsid="001e6797" officeooo:paragraph-rsid="0035a0fb"/>
    </style:style>
    <style:style style:name="P10" style:family="paragraph" style:parent-style-name="Standard" style:list-style-name="L1">
      <style:text-properties style:text-position="0% 100%" officeooo:rsid="00252e95" officeooo:paragraph-rsid="0035a0fb"/>
    </style:style>
    <style:style style:name="P11" style:family="paragraph" style:parent-style-name="Standard">
      <style:text-properties style:text-position="0% 100%" officeooo:rsid="00252e95" officeooo:paragraph-rsid="0035a0fb"/>
    </style:style>
    <style:style style:name="P12" style:family="paragraph" style:parent-style-name="Standard">
      <style:text-properties style:text-position="0% 100%" officeooo:rsid="0042e6be" officeooo:paragraph-rsid="0042e6be"/>
    </style:style>
    <style:style style:name="P13" style:family="paragraph" style:parent-style-name="Standard">
      <style:text-properties style:text-position="0% 100%" officeooo:rsid="0043cabc" officeooo:paragraph-rsid="0043cabc"/>
    </style:style>
    <style:style style:name="P14" style:family="paragraph" style:parent-style-name="Standard">
      <style:text-properties officeooo:rsid="00492e3b" officeooo:paragraph-rsid="00492e3b"/>
    </style:style>
    <style:style style:name="P15" style:family="paragraph" style:parent-style-name="Standard">
      <style:text-properties officeooo:rsid="003ee78b" officeooo:paragraph-rsid="003ee78b"/>
    </style:style>
    <style:style style:name="P16" style:family="paragraph" style:parent-style-name="Standard">
      <style:paragraph-properties fo:break-before="page"/>
      <style:text-properties officeooo:rsid="0030f353" officeooo:paragraph-rsid="0030f353"/>
    </style:style>
    <style:style style:name="P17" style:family="paragraph" style:parent-style-name="Standard">
      <style:text-properties officeooo:rsid="0030f353" officeooo:paragraph-rsid="00370139"/>
    </style:style>
    <style:style style:name="P18" style:family="paragraph" style:parent-style-name="Standard">
      <style:text-properties officeooo:rsid="001e6797" officeooo:paragraph-rsid="00370139"/>
    </style:style>
    <style:style style:name="P19" style:family="paragraph" style:parent-style-name="Standard">
      <style:text-properties officeooo:rsid="0030f353" officeooo:paragraph-rsid="00344702"/>
    </style:style>
    <style:style style:name="P20" style:family="paragraph" style:parent-style-name="Standard">
      <style:text-properties officeooo:rsid="001d2733" officeooo:paragraph-rsid="001d2733"/>
    </style:style>
    <style:style style:name="P21" style:family="paragraph" style:parent-style-name="Standard">
      <style:paragraph-properties fo:break-before="page"/>
      <style:text-properties officeooo:rsid="001d2733" officeooo:paragraph-rsid="001d2733"/>
    </style:style>
    <style:style style:name="P22" style:family="paragraph" style:parent-style-name="Standard">
      <style:paragraph-properties fo:text-align="center" style:justify-single-word="false"/>
      <style:text-properties fo:font-size="16pt" fo:font-weight="bold" officeooo:rsid="00208b46" officeooo:paragraph-rsid="00208b46" style:font-size-asian="16pt" style:font-weight-asian="bold" style:font-size-complex="16pt" style:font-weight-complex="bold"/>
    </style:style>
    <style:style style:name="P23" style:family="paragraph" style:parent-style-name="Standard">
      <style:text-properties officeooo:rsid="001e6797" officeooo:paragraph-rsid="001e6797"/>
    </style:style>
    <style:style style:name="P24" style:family="paragraph" style:parent-style-name="Standard" style:list-style-name="L1">
      <style:text-properties officeooo:rsid="00252e95" officeooo:paragraph-rsid="0030dd42"/>
    </style:style>
    <style:style style:name="P25" style:family="paragraph" style:parent-style-name="Standard" style:list-style-name="L1">
      <style:text-properties officeooo:rsid="00252e95" officeooo:paragraph-rsid="00252e95"/>
    </style:style>
    <style:style style:name="P26" style:family="paragraph" style:parent-style-name="Standard" style:list-style-name="L1">
      <style:text-properties officeooo:paragraph-rsid="00252e95"/>
    </style:style>
    <style:style style:name="P27" style:family="paragraph" style:parent-style-name="Text_20_body" style:list-style-name="L1">
      <style:paragraph-properties fo:margin-top="0cm" fo:margin-bottom="0cm" style:contextual-spacing="false"/>
      <style:text-properties officeooo:paragraph-rsid="00252e95"/>
    </style:style>
    <style:style style:name="P28" style:family="paragraph" style:parent-style-name="Standard" style:list-style-name="L1">
      <style:text-properties officeooo:rsid="001e6797" officeooo:paragraph-rsid="00252e95"/>
    </style:style>
    <style:style style:name="P29" style:family="paragraph" style:parent-style-name="Standard" style:list-style-name="L1">
      <style:text-properties style:text-position="0% 100%" officeooo:rsid="00252e95" officeooo:paragraph-rsid="00252e95"/>
    </style:style>
    <style:style style:name="P30" style:family="paragraph" style:parent-style-name="Standard">
      <style:text-properties officeooo:rsid="00252e95" officeooo:paragraph-rsid="00252e95"/>
    </style:style>
    <style:style style:name="P31" style:family="paragraph" style:parent-style-name="Standard">
      <style:text-properties officeooo:rsid="00208b46" officeooo:paragraph-rsid="0033805f"/>
    </style:style>
    <style:style style:name="P32" style:family="paragraph" style:parent-style-name="Standard">
      <style:text-properties officeooo:rsid="001e6797" officeooo:paragraph-rsid="00252e95"/>
    </style:style>
    <style:style style:name="P33" style:family="paragraph" style:parent-style-name="Standard">
      <style:text-properties officeooo:paragraph-rsid="001eba98"/>
    </style:style>
    <style:style style:name="P34" style:family="paragraph" style:parent-style-name="Standard">
      <style:text-properties officeooo:rsid="00208b46" officeooo:paragraph-rsid="00252e95"/>
    </style:style>
    <style:style style:name="P35" style:family="paragraph" style:parent-style-name="Standard">
      <style:text-properties officeooo:rsid="0020e11f" officeooo:paragraph-rsid="00208b46"/>
    </style:style>
    <style:style style:name="P36" style:family="paragraph" style:parent-style-name="Standard" style:list-style-name="L2">
      <style:text-properties officeooo:rsid="0020e11f" officeooo:paragraph-rsid="0020e11f"/>
    </style:style>
    <style:style style:name="P37" style:family="paragraph" style:parent-style-name="Standard" style:list-style-name="L2">
      <style:text-properties officeooo:rsid="00227e02" officeooo:paragraph-rsid="00227e02"/>
    </style:style>
    <style:style style:name="P38" style:family="paragraph" style:parent-style-name="Standard">
      <style:text-properties officeooo:rsid="00227e02" officeooo:paragraph-rsid="00227e02"/>
    </style:style>
    <style:style style:name="P39" style:family="paragraph" style:parent-style-name="Standard">
      <style:text-properties officeooo:rsid="00273543" officeooo:paragraph-rsid="00273543"/>
    </style:style>
    <style:style style:name="T1" style:family="text">
      <style:text-properties officeooo:rsid="003bbb2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8883d" style:font-style-asian="normal" style:font-style-complex="normal"/>
    </style:style>
    <style:style style:name="T5" style:family="text">
      <style:text-properties fo:font-style="normal" officeooo:rsid="0039f04e" style:font-style-asian="normal" style:font-style-complex="normal"/>
    </style:style>
    <style:style style:name="T6" style:family="text">
      <style:text-properties fo:font-style="normal" officeooo:rsid="003c23c5" style:font-style-asian="normal" style:font-style-complex="normal"/>
    </style:style>
    <style:style style:name="T7" style:family="text">
      <style:text-properties fo:font-style="normal" officeooo:rsid="0030dd42" style:font-style-asian="normal" style:font-style-complex="normal"/>
    </style:style>
    <style:style style:name="T8" style:family="text">
      <style:text-properties style:text-position="sub 58%" fo:font-style="normal" officeooo:rsid="0030dd42" style:font-style-asian="normal" style:font-style-complex="normal"/>
    </style:style>
    <style:style style:name="T9" style:family="text">
      <style:text-properties fo:font-style="normal" officeooo:rsid="001e6797" style:font-style-asian="normal" style:font-style-complex="normal"/>
    </style:style>
    <style:style style:name="T10" style:family="text">
      <style:text-properties style:text-position="sub 58%" fo:font-style="normal" officeooo:rsid="001e6797" style:font-style-asian="normal" style:font-style-complex="normal"/>
    </style:style>
    <style:style style:name="T11" style:family="text">
      <style:text-properties fo:font-style="normal" officeooo:rsid="003dbb84" style:font-style-asian="normal" style:font-style-complex="normal"/>
    </style:style>
    <style:style style:name="T12" style:family="text">
      <style:text-properties style:text-position="sub 58%" fo:font-style="normal" officeooo:rsid="003dbb84" style:font-style-asian="normal" style:font-style-complex="normal"/>
    </style:style>
    <style:style style:name="T13" style:family="text">
      <style:text-properties style:text-position="sub 58%"/>
    </style:style>
    <style:style style:name="T14" style:family="text">
      <style:text-properties officeooo:rsid="001e6797"/>
    </style:style>
    <style:style style:name="T15" style:family="text">
      <style:text-properties style:text-position="sub 58%" officeooo:rsid="001e6797"/>
    </style:style>
    <style:style style:name="T16" style:family="text">
      <style:text-properties officeooo:rsid="0020e11f"/>
    </style:style>
    <style:style style:name="T17" style:family="text">
      <style:text-properties officeooo:rsid="0035a0fb"/>
    </style:style>
    <style:style style:name="T18" style:family="text">
      <style:text-properties officeooo:rsid="00252e95"/>
    </style:style>
    <style:style style:name="T19" style:family="text">
      <style:text-properties officeooo:rsid="001eba98"/>
    </style:style>
    <style:style style:name="T20" style:family="text">
      <style:text-properties style:text-position="0% 100%" officeooo:rsid="0035a0fb"/>
    </style:style>
    <style:style style:name="T21" style:family="text">
      <style:text-properties style:text-position="0% 100%" officeooo:rsid="00252e95"/>
    </style:style>
    <style:style style:name="T22" style:family="text">
      <style:text-properties officeooo:rsid="0045ba00"/>
    </style:style>
    <style:style style:name="T23" style:family="text">
      <style:text-properties officeooo:rsid="0043cabc"/>
    </style:style>
    <style:style style:name="T24" style:family="text">
      <style:text-properties officeooo:rsid="0048ec31"/>
    </style:style>
    <style:style style:name="T25" style:family="text">
      <style:text-properties officeooo:rsid="00208b46"/>
    </style:style>
    <style:style style:name="T26" style:family="text">
      <style:text-properties officeooo:rsid="00246129"/>
    </style:style>
    <style:style style:name="T27" style:family="text">
      <style:text-properties style:text-position="sub 58%" officeooo:rsid="00252e95"/>
    </style:style>
    <style:style style:name="T28" style:family="text">
      <style:text-properties officeooo:rsid="00370139"/>
    </style:style>
    <style:style style:name="T29" style:family="text">
      <style:text-properties fo:font-style="italic" officeooo:rsid="00370139" style:font-style-asian="italic" style:font-style-complex="italic"/>
    </style:style>
    <style:style style:name="T30" style:family="text">
      <style:text-properties officeooo:rsid="0023572a"/>
    </style:style>
    <style:style style:name="T31" style:family="text">
      <style:text-properties style:text-position="sub 58%" officeooo:rsid="001eba98"/>
    </style:style>
    <style:style style:name="T32" style:family="text">
      <style:text-properties officeooo:rsid="002d8f5b"/>
    </style:style>
    <style:style style:name="T33" style:family="text">
      <style:text-properties officeooo:rsid="0030dd42"/>
    </style:style>
    <style:style style:name="T34" style:family="text">
      <style:text-properties style:text-position="0% 100%"/>
    </style:style>
    <style:style style:name="T35" style:family="text">
      <style:text-properties officeooo:rsid="00227e02"/>
    </style:style>
    <style:style style:name="T36" style:family="text">
      <style:text-properties officeooo:rsid="00292c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text:span>ous posons un jeu dans lequel un agent <text:span text:style-name="T2">i</text:span> a le choix d’effectuer une action <text:span text:style-name="T2">s</text:span><text:span text:style-name="T3">. Cette action est mise en place par une institution publique qui </text:span><text:span text:style-name="T4">utilise</text:span><text:span text:style-name="T3"> une </text:span><text:span text:style-name="T5">intervention</text:span><text:span text:style-name="T3"> pour inciter les agents à effectuer cette action (a = 1 </text:span><text:span text:style-name="T6">sachant que </text:span><text:span text:style-name="T7">a</text:span><text:span text:style-name="T8">i</text:span><text:span text:style-name="T7"> = 1 </text:span><text:span text:style-name="T3">si et seulement si</text:span><text:span text:style-name="T7"> V</text:span><text:span text:style-name="T8">i</text:span><text:span text:style-name="T7"> ≥ c – </text:span><text:span text:style-name="T9">ø</text:span><text:span text:style-name="T7">(n) + </text:span><text:span text:style-name="T9">θ</text:span><text:span text:style-name="T10">i</text:span><text:span text:style-name="T7">tanh(n/T) </text:span><text:span text:style-name="T11">ou U</text:span><text:span text:style-name="T12">i</text:span><text:span text:style-name="T11">(1) ≥ 0</text:span><text:span text:style-name="T6">)</text:span><text:span text:style-name="T3">.</text:span></text:p>
      <text:p text:style-name="P2"><text:span text:style-name="T3">Pour chaque agent </text:span><text:span text:style-name="T2">i</text:span><text:span text:style-name="T3">, nous définissons une fonction d’utilité</text:span><text:span text:style-name="T2"> U </text:span><text:span text:style-name="T3">telle que :</text:span></text:p>
      <text:p text:style-name="P3"/>
      <text:p text:style-name="P4">U<text:span text:style-name="T13">i</text:span>(a) = a * [ V<text:span text:style-name="T13">i</text:span> – ( c – <text:span text:style-name="T14">ø(n)</text:span>) - <text:span text:style-name="T14">θ</text:span><text:span text:style-name="T15">i</text:span><text:span text:style-name="T14"> </text:span>* tanh(<text:span text:style-name="T16">n/T) ]</text:span></text:p>
      <text:p text:style-name="P4"/>
      <text:p text:style-name="P5"><text:span text:style-name="T17">où</text:span> : </text:p>
      <text:list text:style-name="L1">
        <text:list-item>
          <text:p text:style-name="P6">a <text:span text:style-name="T17">est un</text:span> paramètre binaire {0,1} </text:p>
        </text:list-item>
        <text:list-item>
          <text:p text:style-name="P6">V<text:span text:style-name="T13">i</text:span> <text:span text:style-name="T17">représente les</text:span> motivation<text:span text:style-name="T17">s </text:span>intrinsèque<text:span text:style-name="T17">s hétérogènes des agents via une d</text:span>istribution normale tronquée</text:p>
        </text:list-item>
        <text:list-item>
          <text:p text:style-name="P6">c <text:span text:style-name="T17">est le</text:span> coût de base fixe</text:p>
        </text:list-item>
        <text:list-item>
          <text:p text:style-name="P7"><text:span text:style-name="T14">ø(n) </text:span><text:span text:style-name="T17">est l’</text:span><text:span text:style-name="T18">efficacité du nudge tel</text:span><text:span text:style-name="T17">le</text:span><text:span text:style-name="T18"> que </text:span></text:p>
          <text:list>
            <text:list-item>
              <text:p text:style-name="P7"><text:span text:style-name="T14">ø(n) </text:span><text:span text:style-name="T19">= γ ln(1+n)</text:span><text:span text:style-name="T18"> </text:span></text:p>
            </text:list-item>
            <text:list-item>
              <text:p text:style-name="P7"><text:span text:style-name="T14">ø</text:span>(0)=0</text:p>
            </text:list-item>
            <text:list-item>
              <text:p text:style-name="P8"><text:span text:style-name="T14">ø</text:span>′(n)&gt;0 (efficacité croissante) </text:p>
            </text:list-item>
            <text:list-item>
              <text:p text:style-name="P8"><text:span text:style-name="T14">ø</text:span>′′(n)&lt;0 (rendements décroissants) </text:p>
            </text:list-item>
          </text:list>
        </text:list-item>
        <text:list-item>
          <text:p text:style-name="P9">θ<text:span text:style-name="T13">i </text:span><text:span text:style-name="T20">est la </text:span><text:span text:style-name="T21">sensibilité à la réactance </text:span><text:span text:style-name="T20">et suit une d</text:span><text:span text:style-name="T21">istribution Gamma </text:span></text:p>
        </text:list-item>
        <text:list-item>
          <text:p text:style-name="P10">tanh(n/T) <text:span text:style-name="T17">est le</text:span> signal de réactance. Fonction non linéaire.</text:p>
        </text:list-item>
        <text:list-item>
          <text:p text:style-name="P10">T <text:span text:style-name="T17">représente la</text:span> confiance institutionnelle </text:p>
        </text:list-item>
      </text:list>
      <text:p text:style-name="P11"/>
      <text:p text:style-name="P11"/>
      <text:p text:style-name="P11">P(n) = P(V_i ≥ S(n, θ_i)) </text:p>
      <text:p text:style-name="P11"/>
      <text:p text:style-name="P12">Modélisation avec ABM</text:p>
      <text:p text:style-name="P12"/>
      <text:p text:style-name="P13">Faire une note type projet de thèse : </text:p>
      <text:p text:style-name="P13">- <text:span text:style-name="T22">É</text:span>tat de l’art</text:p>
      <text:p text:style-name="P3">- <text:span text:style-name="T23">Idée de base </text:span><text:span text:style-name="T24">et pourquoi la faire (mettre des exemples)</text:span></text:p>
      <text:p text:style-name="P3">- <text:span text:style-name="T23">La réactance qu’est-ce que c’est et comment on la modélise</text:span></text:p>
      <text:p text:style-name="P3">- <text:span text:style-name="T23">Comment tester ça dans une thèse (différentes approches : théorique, expé, implémentation…)</text:span></text:p>
      <text:p text:style-name="P3"/>
      <text:p text:style-name="P14">+ envoyer début ébauche d’article</text:p>
      <text:p text:style-name="P3"/>
      <text:p text:style-name="P15"/>
      <text:p text:style-name="P15"/>
      <text:p text:style-name="P16">🔹 Proposition 1 — Résultat agrégé (inefficacité potentielle du nudge)<text:line-break/>🎯 Rôle dans le papier<text:line-break/><text:line-break/>C’est le résultat central :<text:line-break/><text:line-break/>elle montre que plus de nudge ≠ plus d’adoption<text:line-break/><text:line-break/>elle formalise l’inefficacité structurelle potentielle<text:line-break/><text:line-break/>👉 C’est ce qui justifie l’existence du papier.<text:line-break/><text:line-break/>📌 Contenu conceptuel<text:line-break/><text:line-break/>Objet : part de la population qui adopte<text:line-break/><text:line-break/>Mécanisme : arbitrage coût matériel / coût psychologique<text:line-break/><text:line-break/>Résultat : non-monotonie de l’adoption agrégée en <text:line-break/>𝑛<text:line-break/>n<text:line-break/><text:line-break/>✍️ Formulation canonique (journal-ready)<text:line-break/>\begin{proposition}<text:line-break/>Let $P(n)$ denote the share of agents undertaking the action. Under heterogeneous intrinsic <text:line-break/>motivations $V_i$ and heterogeneous reactance sensitivities $\theta_i$, $P(n)$ is generally <text:line-break/>non-monotonic in the intensity of the nudge $n$. In particular, there exists a threshold <text:line-break/>$\bar{n} &gt; 0$ such that for $n &gt; \bar{n}$, an increase in nudge intensity reduces aggregate <text:line-break/>adoption.<text:line-break/>\end{proposition}<text:line-break/><text:line-break/>🚫 Ce que la Proposition 1 ne fait pas<text:line-break/><text:line-break/>ne dit pas qui adopte<text:line-break/><text:line-break/>ne dit pas pourquoi individuellement<text:line-break/><text:line-break/>ne parle pas de rationalité ou de normatif<text:line-break/><text:line-break/>🔹 Proposition 2 — Mécanisme micro (seuil et sélection)<text:line-break/>🎯 Rôle dans le papier<text:line-break/><text:line-break/>Elle explique Proposition 1 :<text:line-break/><text:line-break/>elle identifie le mécanisme micro<text:line-break/><text:line-break/>elle montre le tri endogène des agents<text:line-break/><text:line-break/>👉 C’est la “micro-foundation” du résultat agrégé.<text:line-break/><text:line-break/>📌 Contenu conceptuel<text:line-break/><text:line-break/>Objet : décision individuelle<text:line-break/><text:soft-page-break/><text:line-break/>Résultat : existence d’un seuil de réactance<text:line-break/><text:line-break/>Effet clé : sélection des agents à forte autonomie<text:line-break/><text:line-break/>✍️ Formulation canonique (journal-safe)<text:line-break/>\begin{proposition}<text:line-break/>For any given level of intrinsic motivation $V_i$ and nudge intensity $n$, there exists a <text:line-break/>threshold $\bar{\theta}(V_i,n)$ such that agent $i$ undertakes the action if and only if <text:line-break/>$\theta_i \le \bar{\theta}(V_i,n)$. Moreover, $\bar{\theta}(V_i,n)$ is decreasing in $n$.<text:line-break/>\end{proposition}<text:line-break/><text:line-break/>🚫 Ce que la Proposition 2 ne fait pas<text:line-break/><text:line-break/>ne parle pas d’agrégé<text:line-break/><text:line-break/>ne parle pas d’optimum social<text:line-break/><text:line-break/>ne discute pas de politique publique</text:p>
      <text:p text:style-name="P16"/>
      <text:p text:style-name="P2">Nous posons aussi que chaque agent <text:span text:style-name="T2">i</text:span> prend une décision rationnelle <text:s/><text:span text:style-name="T25">et cherche à maximiser une utilité élargie. </text:span><text:span text:style-name="T26">L</text:span><text:span text:style-name="T25">a non-conformité n’est pas irrationnelle et résulte d’un calcul coût/bénéfice qui intègre la réactance. </text:span></text:p>
      <text:p text:style-name="P3"/>
      <text:p text:style-name="P17"><text:s/>L'agent choisit d'agir (a = 1) si le bénéfice net perçu est positif. La motivation intrinsèque <text:span text:style-name="T18">V</text:span><text:span text:style-name="T27">i</text:span> <text:span text:style-name="T28">reflète</text:span> la diversité des convictions et des normes morales au sein de la population. Le coût de l'action est réduit par l'intensité du nudge <text:span text:style-name="T29">n</text:span> via une fonction d'efficacité <text:span text:style-name="T14">ø(n) </text:span><text:span text:style-name="T19">= γ ln(1+n)</text:span>. Cette forme concave traduit l'idée que les premières interventions sont les plus efficaces, mais que l'utilité marginale d'une intensité supplémentaire décroît rapidement. L'innovation du modèle réside dans l'intégration d'un coût de réactance, produit de la sensibilité individuelle <text:span text:style-name="T14">θ</text:span><text:span text:style-name="T15">i </text:span> et d'un signal de contrôle <text:span text:style-name="T21">tanh(n/T)</text:span>. </text:p>
      <text:p text:style-name="P18"><text:span text:style-name="T18">La fonction</text:span> θ<text:span text:style-name="T13">i</text:span> <text:span text:style-name="T19">capture l’idée </text:span><text:span text:style-name="T30">que</text:span><text:span text:style-name="T19"> la plupart des agents ont une sensibilité faible au contrôle mais </text:span><text:span text:style-name="T18">qu’</text:span><text:span text:style-name="T19">une fraction possède une sensibilité élevée.</text:span> <text:span text:style-name="T19">Elle est indépendante de V</text:span><text:span text:style-name="T31">i</text:span><text:span text:style-name="T19">.</text:span></text:p>
      <text:p text:style-name="P18"><text:span text:style-name="T18">Le signal de réactance</text:span> <text:span text:style-name="T25">tanh(n/T) est une fonction non linéaire de saturation qui assure que le coût psychologique est borné. </text:span></text:p>
      <text:p text:style-name="P18"><text:span text:style-name="T19">T est un paramètre global et exogène qui représente le climat social et/ou le cadre </text:span><text:span text:style-name="T32">institutionnel </text:span><text:span text:style-name="T19">asymétrique, </text:span><text:span text:style-name="T26">il capte la notion de s-frame</text:span><text:span text:style-name="T19">. </text:span></text:p>
      <text:p text:style-name="P17"/>
      <text:p text:style-name="P3"/>
      <text:p text:style-name="P19"/>
      <text:p text:style-name="P20"/>
      <text:p text:style-name="P21">Hypothèses du modèle</text:p>
      <text:p text:style-name="P20"/>
      <text:p text:style-name="P20"/>
      <text:p text:style-name="P22">U<text:span text:style-name="T13">i</text:span>(a) = a * [ V<text:span text:style-name="T13">i</text:span> – ( c – <text:span text:style-name="T14">ø(n)</text:span>) - <text:span text:style-name="T14">θ</text:span><text:span text:style-name="T15">i</text:span><text:span text:style-name="T14"> </text:span>* tanh(<text:span text:style-name="T16">n/T) ]</text:span></text:p>
      <text:p text:style-name="P22"/>
      <text:p text:style-name="P23">Variables de l’équation : </text:p>
      <text:list text:continue-numbering="true" text:style-name="L1">
        <text:list-item>
          <text:p text:style-name="P24">a : paramètre binaire {0,1} – <text:span text:style-name="T33">ai = 1 iff Vi ≥ c – </text:span><text:span text:style-name="T14">ø</text:span><text:span text:style-name="T33">(n) + </text:span><text:span text:style-name="T14">θ</text:span><text:span text:style-name="T15">i</text:span><text:span text:style-name="T33">tanh(n/T)</text:span></text:p>
        </text:list-item>
        <text:list-item>
          <text:p text:style-name="P25">V<text:span text:style-name="T13">i</text:span> : fonction de motivation intrinsèque de distribution normale tronquée</text:p>
        </text:list-item>
        <text:list-item>
          <text:p text:style-name="P25">c : coût de base fixe</text:p>
        </text:list-item>
        <text:list-item>
          <text:p text:style-name="P26"><text:span text:style-name="T14">ø(n) : </text:span><text:span text:style-name="T18">efficacité du nudge tel que </text:span></text:p>
          <text:list>
            <text:list-item>
              <text:p text:style-name="P26"><text:span text:style-name="T14">ø(n) </text:span><text:span text:style-name="T19">= γ ln(1+n)</text:span><text:span text:style-name="T18"> </text:span></text:p>
            </text:list-item>
            <text:list-item>
              <text:p text:style-name="P26"><text:span text:style-name="T14">ø</text:span>(0)=0</text:p>
            </text:list-item>
            <text:list-item>
              <text:p text:style-name="P27"><text:span text:style-name="T14">ø</text:span>′(n)&gt;0 (efficacité croissante) </text:p>
            </text:list-item>
            <text:list-item>
              <text:p text:style-name="P27"><text:span text:style-name="T14">ø</text:span>′′(n)&lt;0 (rendements décroissants) </text:p>
            </text:list-item>
          </text:list>
        </text:list-item>
        <text:list-item>
          <text:p text:style-name="P28">θ<text:span text:style-name="T13">i </text:span><text:span text:style-name="T34">: </text:span><text:span text:style-name="T21">sensibilité à la réactance. Distribution Gamma </text:span></text:p>
        </text:list-item>
        <text:list-item>
          <text:p text:style-name="P29">tanh(n/T) : signal de réactance. Fonction non linéaire.</text:p>
        </text:list-item>
        <text:list-item>
          <text:p text:style-name="P29">T : confiance institutionnelle </text:p>
        </text:list-item>
      </text:list>
      <text:p text:style-name="P23"/>
      <text:p text:style-name="P30">Hypothèses :</text:p>
      <text:p text:style-name="P31"/>
      <text:p text:style-name="P31">Pour ces travaux, nous posons l’hypothèse suivante sur les agents : Ils sont rationnels et cherchent à maximiser une utilité élargie. <text:span text:style-name="T26">L</text:span>a non-conformité n’est pas irrationnelle et résulte d’un calcul coût/bénéfice qui intègre la réactance. </text:p>
      <text:p text:style-name="P31"/>
      <text:p text:style-name="P32"><text:span text:style-name="T18">Le paramètre « </text:span>a » <text:span text:style-name="T18">prend la valeur de 1 si </text:span>l’agent adopte le comportement recommandé et 0 sinon. <text:span text:style-name="T18">V</text:span><text:span text:style-name="T13">i</text:span> <text:span text:style-name="T18">correspond au </text:span>bénéfice non monétaire lié à l’action, elle représente la nature hétérogène des convictions des agents (altruistes, norme morale etc.) </text:p>
      <text:p text:style-name="P32"><text:span text:style-name="T18">Le coût « </text:span>c » <text:span text:style-name="T18">est</text:span> identique pour tous, indépendant du Nudge et exogène. On suppose que la barrière technique est la même pour tout le monde. L’hétérogénéité est déjà captée par θ<text:span text:style-name="T13">i</text:span> et V<text:span text:style-name="T13">i</text:span>.</text:p>
      <text:p text:style-name="P33"><text:span text:style-name="T18">La fonction</text:span><text:span text:style-name="T14"> ø(n) modélise les rendements décroissants du nudge. Les premières mesures de choix sont très efficaces mais l’utilité marginale d’une intensité n supplémentaire diminue rapidement.</text:span></text:p>
      <text:p text:style-name="P23"><text:span text:style-name="T18">La fonction</text:span> θ<text:span text:style-name="T13">i</text:span> <text:span text:style-name="T19">capture l’idée </text:span><text:span text:style-name="T30">que</text:span><text:span text:style-name="T19"> la plupart des agents ont une sensibilité faible au contrôle mais </text:span><text:span text:style-name="T18">qu’</text:span><text:span text:style-name="T19">une fraction possède une sensibilité élevée.</text:span> <text:span text:style-name="T19">Elle est indépendante de V</text:span><text:span text:style-name="T31">i</text:span><text:span text:style-name="T19">.</text:span></text:p>
      <text:p text:style-name="P32"><text:span text:style-name="T18">Le signal de réactance</text:span> <text:span text:style-name="T25">tanh(n/T) est une fonction non linéaire de saturation qui assure que le coût psychologique est borné. </text:span></text:p>
      <text:p text:style-name="P32"><text:span text:style-name="T19">T est un paramètre global et exogène qui représente le climat social et/ou le cadre </text:span><text:span text:style-name="T32">institutionnel </text:span><text:span text:style-name="T19">asymétrique, </text:span><text:span text:style-name="T26">il capte la notion de s-frame</text:span><text:span text:style-name="T19">. </text:span></text:p>
      <text:p text:style-name="P34"><text:line-break/></text:p>
      <text:p text:style-name="P34"><text:span text:style-name="T18">Relations fonctionnelles :</text:span><text:line-break/></text:p>
      <text:p text:style-name="P34"><text:span text:style-name="T26">N</text:span><text:span text:style-name="T30">ous postulons ce qui suit</text:span><text:span text:style-name="T16"> : </text:span></text:p>
      <text:p text:style-name="P35">L’utilité d’un agent i pour une décision a est fonction de sa motivation intrinsèque, du coût de l’action, de l’efficacité de la politique publique, de sa sensibilité à la réactance et de sa confiance en l’institution qu émet la politique publique de tel sorte que :</text:p>
      <text:list text:style-name="L2">
        <text:list-item>
          <text:list>
            <text:list-item>
              <text:p text:style-name="P36"><text:span text:style-name="T35">L</text:span>’ensemble des motivations au sein d’une population se réparti en suivant une distribution normale borné<text:span text:style-name="T30">e</text:span>.</text:p>
            </text:list-item>
            <text:list-item>
              <text:p text:style-name="P36"><text:span text:style-name="T35">L</text:span>es coûts liés à l’action <text:span text:style-name="T30">mettent</text:span> en avant le seuil optimal pour lequel un nudge vient <text:span text:style-name="T30">contrebalancer</text:span> le coût pour chaque agent. </text:p>
            </text:list-item>
            <text:list-item>
              <text:p text:style-name="P37">La réactance dépend de la sensibilité de chaque agent au contrôle ou à aller contre les décisions publiques et, le signal de réactance ou coût psychologique. Ce dernier dépend <text:soft-page-break/>de la confiance des agents dans les institutions permettant de représenter <text:span text:style-name="T30">la diversité des</text:span> climats géopolitiques et des libertés dans des contextes de mise en place de politiques publiques et de nudges. </text:p>
            </text:list-item>
          </text:list>
        </text:list-item>
      </text:list>
      <text:p text:style-name="P38"/>
      <text:p text:style-name="P39">L’innovation du modèle réside dans le fait d’introduire un coût de réactance <text:span text:style-name="T36">dans la fonction d’utilité des agent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31T16:20:24.502000000</meta:creation-date>
    <dc:date>2026-05-27T09:51:00.683000000</dc:date>
    <meta:editing-duration>PT2H7M21S</meta:editing-duration>
    <meta:editing-cycles>32</meta:editing-cycles>
    <meta:generator>LibreOffice/24.8.0.3$Windows_X86_64 LibreOffice_project/0bdf1299c94fe897b119f97f3c613e9dca6be583</meta:generator>
    <meta:document-statistic meta:table-count="0" meta:image-count="0" meta:object-count="0" meta:page-count="6" meta:paragraph-count="59" meta:word-count="1196" meta:character-count="7356" meta:non-whitespace-character-count="6166"/>
  </office:meta>
</office:document-meta>
</file>