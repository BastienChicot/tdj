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ustification des hypothèses</text:h>
      <text:h text:style-name="Heading_20_3" text:outline-level="3">Pourquoi :</text:h>
      <text:list text:style-name="L1">
        <text:list-item>
          <text:p text:style-name="P1">normale tronquée ? </text:p>
        </text:list-item>
      </text:list>
      <text:h text:style-name="Heading_20_3" text:outline-level="3">Pourquoi :</text:h>
      <text:list text:style-name="L2">
        <text:list-item>
          <text:p text:style-name="P2">Gamma ? </text:p>
        </text:list-item>
      </text:list>
      <text:h text:style-name="Heading_20_3" text:outline-level="3">Pourquoi :</text:h>
      <text:list text:style-name="L3">
        <text:list-item>
          <text:p text:style-name="P3">logarithme ? </text:p>
        </text:list-item>
      </text:list>
      <text:h text:style-name="Heading_20_3" text:outline-level="3">Pourquoi :</text:h>
      <text:list text:style-name="L4">
        <text:list-item>
          <text:p text:style-name="P4">tanh ? </text:p>
        </text:list-item>
      </text:list>
      <text:h text:style-name="Heading_20_3" text:outline-level="3">Pourquoi :</text:h>
      <text:list text:style-name="L5">
        <text:list-item>
          <text:p text:style-name="P5">confiance commune 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1T16:27:34.705000000</meta:creation-date>
    <dc:date>2026-06-01T16:27:43.834000000</dc:date>
    <meta:editing-duration>PT9S</meta:editing-duration>
    <meta:editing-cycles>1</meta:editing-cycles>
    <meta:document-statistic meta:table-count="0" meta:image-count="0" meta:object-count="0" meta:page-count="1" meta:paragraph-count="11" meta:word-count="30" meta:character-count="149" meta:non-whitespace-character-count="131"/>
    <meta:generator>LibreOffice/24.8.0.3$Windows_X86_64 LibreOffice_project/0bdf1299c94fe897b119f97f3c613e9dca6be583</meta:generator>
  </office:meta>
</office:document-meta>
</file>