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4.166cm" table:align="left"/>
    </style:style>
    <style:style style:name="Tableau1.A" style:family="table-column">
      <style:table-column-properties style:column-width="5.131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533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size="16pt" fo:font-style="normal" fo:font-weight="bold" officeooo:rsid="00161a2f" officeooo:paragraph-rsid="00161a2f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Heading_20_2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Heading_20_2">
      <style:paragraph-properties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Heading_20_2">
      <style:paragraph-properties fo:keep-with-next="always"/>
      <style:text-properties fo:font-size="16pt" fo:font-style="normal" officeooo:rsid="00161a2f" officeooo:paragraph-rsid="00161a2f" style:font-size-asian="16pt" style:font-style-asian="normal" style:font-size-complex="16pt" style:font-style-complex="normal"/>
    </style:style>
    <style:style style:name="P13" style:family="paragraph" style:parent-style-name="Heading_20_2" style:list-style-name="L5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Heading_20_2" style:list-style-name="L5">
      <style:paragraph-properties fo:keep-with-next="always"/>
      <style:text-properties fo:font-weight="normal" style:font-weight-asian="normal" style:font-weight-complex="normal"/>
    </style:style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5"/>
    <style:style style:name="P21" style:family="paragraph" style:parent-style-name="Heading_20_2">
      <style:text-properties fo:font-weight="normal" style:font-weight-asian="normal" style:font-weight-complex="normal"/>
    </style:style>
    <style:style style:name="P22" style:family="paragraph" style:parent-style-name="Heading_20_2">
      <style:paragraph-properties fo:keep-with-next="always"/>
      <style:text-properties fo:font-weight="normal" style:font-weight-asian="normal" style:font-weight-complex="normal"/>
    </style:style>
    <style:style style:name="P23" style:family="paragraph" style:parent-style-name="Text_20_body" style:list-style-name="L8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9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3"/>
    <style:style style:name="P3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7a9c8"/>
    </style:style>
    <style:style style:name="T2" style:family="text">
      <style:text-properties officeooo:rsid="001847e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ustification des hypothèses</text:h>
      <text:h text:style-name="P1" text:outline-level="2">LOI NORMALE POUR LA MOTIVATION</text:h>
      <text:h text:style-name="P2" text:outline-level="2">Pourquoi une loi normale ?</text:h>
      <text:p text:style-name="Text_20_body">Parce qu'on voulait représenter :</text:p>
      <text:p text:style-name="Quotations">l'hétérogénéité naturelle des motivations dans la population.</text:p>
      <text:p text:style-name="Text_20_body">Intuition :</text:p>
      <text:list text:style-name="L1">
        <text:list-item>
          <text:p text:style-name="P3">peu d'agents extrêmement motivés ; </text:p>
        </text:list-item>
        <text:list-item>
          <text:p text:style-name="P3">peu d'agents extrêmement démotivés ; </text:p>
        </text:list-item>
        <text:list-item>
          <text:p text:style-name="P4">majorité des individus autour d'une valeur moyenne. </text:p>
        </text:list-item>
      </text:list>
      <text:p text:style-name="Text_20_body">Exemple (don d'organes) :</text:p>
      <text:list text:style-name="L2">
        <text:list-item>
          <text:p text:style-name="P5">certains sont très favorables ; </text:p>
        </text:list-item>
        <text:list-item>
          <text:p text:style-name="P5">certains sont opposés ; </text:p>
        </text:list-item>
        <text:list-item>
          <text:p text:style-name="P6">beaucoup sont relativement neutres. </text:p>
        </text:list-item>
      </text:list>
      <text:p text:style-name="Text_20_body">La normale représente naturellement ce phénomène.</text:p>
      <text:p text:style-name="Horizontal_20_Line"/>
      <text:h text:style-name="P7" text:outline-level="2">Pourquoi la tronquer ?</text:h>
      <text:p text:style-name="Text_20_body">Deux raisons.</text:p>
      <text:h text:style-name="Heading_20_3" text:outline-level="3">(a) Éviter les motivations négatives</text:h>
      <text:p text:style-name="Text_20_body">Si :</text:p>
      <text:p text:style-name="Text_20_body">Vi&lt;0</text:p>
      <text:p text:style-name="Text_20_body">cela voudrait dire :</text:p>
      <text:p text:style-name="Quotations">l'action procure une désutilité intrinsèque.</text:p>
      <text:p text:style-name="Text_20_body">Ce n'était pas l'objet du modèle.</text:p>
      <text:p text:style-name="Text_20_body">On voulait :</text:p>
      <text:p text:style-name="Text_20_body">Vi=0</text:p>
      <text:p text:style-name="Text_20_body">comme absence totale de motivation.</text:p>
      <text:p text:style-name="Horizontal_20_Line"/>
      <text:h text:style-name="Heading_20_3" text:outline-level="3">(b) Éviter les valeurs extrêmes</text:h>
      <text:p text:style-name="Text_20_body">La normale non tronquée permet :</text:p>
      <text:p text:style-name="Text_20_body">Vi→±∞</text:p>
      <text:p text:style-name="Text_20_body"><text:soft-page-break/>ce qui peut produire :</text:p>
      <text:list text:style-name="L3">
        <text:list-item>
          <text:p text:style-name="P8">des agents qui adoptent toujours ; </text:p>
        </text:list-item>
        <text:list-item>
          <text:p text:style-name="P9">des agents qui n'adoptent jamais. </text:p>
        </text:list-item>
      </text:list>
      <text:p text:style-name="Text_20_body">On voulait éviter que quelques observations dominent les simulations.</text:p>
      <text:p text:style-name="Horizontal_20_Line"/>
      <text:h text:style-name="P7" text:outline-level="2">Ce que cela signifie économiquement</text:h>
      <text:p text:style-name="Text_20_body">Vi représente :</text:p>
      <text:list text:style-name="L4">
        <text:list-item>
          <text:p text:style-name="P10">préférences ; </text:p>
        </text:list-item>
        <text:list-item>
          <text:p text:style-name="P10">identité ; </text:p>
        </text:list-item>
        <text:list-item>
          <text:p text:style-name="P10">valeurs ; </text:p>
        </text:list-item>
        <text:list-item>
          <text:p text:style-name="P10">motivation morale ; </text:p>
        </text:list-item>
        <text:list-item>
          <text:p text:style-name="P11">bénéfice perçu.</text:p>
        </text:list-item>
      </text:list>
      <text:p text:style-name="Text_20_body"/>
      <text:h text:style-name="P12" text:outline-level="2">DISTRIBUTION GAMMA</text:h>
      <text:list text:style-name="L5">
        <text:list-item>
          <text:h text:style-name="P13" text:outline-level="2">Forme retenue</text:h>
        </text:list-item>
      </text:list>
      <text:p text:style-name="P14">θi∼Γ(k,λ)</text:p>
      <text:p text:style-name="Horizontal_20_Line"/>
      <text:list text:continue-numbering="true" text:style-name="L5">
        <text:list-item>
          <text:h text:style-name="P15" text:outline-level="2">Pourquoi pas une normale ?</text:h>
        </text:list-item>
      </text:list>
      <text:p text:style-name="Text_20_body">Parce qu'on voulait :</text:p>
      <text:p text:style-name="Text_20_body">θi≥0</text:p>
      <text:p text:style-name="Text_20_body">Un agent ne peut pas avoir :</text:p>
      <text:p text:style-name="Quotations">une réactance négative.</text:p>
      <text:p text:style-name="Horizontal_20_Line"/>
      <text:list xml:id="list173213296755389" text:continue-numbering="true" text:style-name="L5">
        <text:list-item>
          <text:h text:style-name="P15" text:outline-level="2">Pourquoi la Gamma ?</text:h>
        </text:list-item>
      </text:list>
      <text:p text:style-name="Text_20_body">Parce qu'elle possède trois propriétés utiles.</text:p>
      <text:h text:style-name="Heading_20_3" text:outline-level="3">(a) Strictement positive</text:h>
      <text:p text:style-name="P14">θi&gt;0</text:p>
      <text:p text:style-name="Horizontal_20_Line"/>
      <text:h text:style-name="Heading_20_3" text:outline-level="3">(b) Asymétrique</text:h>
      <text:p text:style-name="Text_20_body">Beaucoup d'agents :</text:p>
      <text:p text:style-name="Text_20_body">→ peu réactants.</text:p>
      <text:p text:style-name="Text_20_body"><text:soft-page-break/>Peu d'agents :</text:p>
      <text:p text:style-name="Text_20_body">→ très réactants.</text:p>
      <text:p text:style-name="Text_20_body">Ce qui correspond assez bien à l'intuition politique.</text:p>
      <text:p text:style-name="Horizontal_20_Line"/>
      <text:h text:style-name="Heading_20_3" text:outline-level="3">(c) Contrôle facile des queues</text:h>
      <text:p text:style-name="Text_20_body">Tu peux créer :</text:p>
      <text:list text:style-name="L6">
        <text:list-item>
          <text:p text:style-name="P16">société docile ; </text:p>
        </text:list-item>
        <text:list-item>
          <text:p text:style-name="P16">société polarisée ; </text:p>
        </text:list-item>
        <text:list-item>
          <text:p text:style-name="P17">société anti-institution. </text:p>
        </text:list-item>
      </text:list>
      <text:p text:style-name="Text_20_body">simplement via shape et scale.</text:p>
      <text:p text:style-name="Horizontal_20_Line"/>
      <text:list xml:id="list173212784417954" text:continue-list="list173213296755389" text:style-name="L5">
        <text:list-item>
          <text:h text:style-name="P15" text:outline-level="2">Interprétation économique</text:h>
        </text:list-item>
      </text:list>
      <text:p text:style-name="Text_20_body">θi représente :</text:p>
      <text:list text:style-name="L7">
        <text:list-item>
          <text:p text:style-name="P18">besoin d'autonomie ; </text:p>
        </text:list-item>
        <text:list-item>
          <text:p text:style-name="P18">méfiance ; </text:p>
        </text:list-item>
        <text:list-item>
          <text:p text:style-name="P18">rejet du contrôle ; </text:p>
        </text:list-item>
        <text:list-item>
          <text:p text:style-name="P19">tendance à la contradiction.</text:p>
        </text:list-item>
      </text:list>
      <text:list text:continue-list="list173212784417954" text:style-name="L5">
        <text:list-item>
          <text:p text:style-name="P20"/>
        </text:list-item>
      </text:list>
      <text:h text:style-name="P12" text:outline-level="2">Efficacité du nudge ϕ(n) → Logarithme</text:h>
      <text:h text:style-name="P21" text:outline-level="2">Forme retenue</text:h>
      <text:p text:style-name="P14">ϕ(n)=γln⁡(1+n)</text:p>
      <text:p text:style-name="Horizontal_20_Line"/>
      <text:h text:style-name="P22" text:outline-level="2">Pourquoi ?</text:h>
      <text:p text:style-name="Text_20_body">Parce qu'on voulait :</text:p>
      <text:h text:style-name="Heading_20_3" text:outline-level="3">rendement marginal décroissant</text:h>
      <text:p text:style-name="Text_20_body">ϕ′(n)&gt;0</text:p>
      <text:p text:style-name="Text_20_body">mais :</text:p>
      <text:p text:style-name="P14">ϕ′′(n)&lt;0</text:p>
      <text:p text:style-name="Horizontal_20_Line"/>
      <text:p text:style-name="Text_20_body">Interprétation :</text:p>
      <text:p text:style-name="Text_20_body">Premier nudge :</text:p>
      <text:p text:style-name="Text_20_body"><text:soft-page-break/>→ très utile.</text:p>
      <text:p text:style-name="Text_20_body">Deuxième :</text:p>
      <text:p text:style-name="Text_20_body">→ utile.</text:p>
      <text:p text:style-name="Text_20_body">Dixième :</text:p>
      <text:p text:style-name="Text_20_body">→ presque aucun gain.</text:p>
      <text:p text:style-name="Horizontal_20_Line"/>
      <text:p text:style-name="Text_20_body">Exemple :</text:p>
      <text:p text:style-name="Text_20_body">Pré-cocher une case :</text:p>
      <text:list text:style-name="L8">
        <text:list-item>
          <text:p text:style-name="P23">gros effet. </text:p>
        </text:list-item>
      </text:list>
      <text:p text:style-name="Text_20_body">Ajouter :</text:p>
      <text:list text:style-name="L9">
        <text:list-item>
          <text:p text:style-name="P24">une couleur ; </text:p>
        </text:list-item>
        <text:list-item>
          <text:p text:style-name="P24">un rappel ; </text:p>
        </text:list-item>
        <text:list-item>
          <text:p text:style-name="P25">une animation ; </text:p>
        </text:list-item>
      </text:list>
      <text:p text:style-name="Text_20_body">→ gain limité.</text:p>
      <text:p text:style-name="Horizontal_20_Line"/>
      <text:h text:style-name="P22" text:outline-level="2">Pourquoi pas une droite ?</text:h>
      <text:p text:style-name="Text_20_body">Car :</text:p>
      <text:p text:style-name="Text_20_body">ϕ(n)=γn</text:p>
      <text:p text:style-name="Text_20_body">impliquerait :</text:p>
      <text:p text:style-name="Quotations">chaque intensification est aussi efficace.</text:p>
      <text:p text:style-name="Text_20_body">Peu crédible.</text:p>
      <text:p text:style-name="Horizontal_20_Line"/>
      <text:h text:style-name="P22" text:outline-level="2">Ce qu'on a découvert ensuite</text:h>
      <text:p text:style-name="Text_20_body">Le logarithme n'est pas borné.</text:p>
      <text:p text:style-name="Text_20_body">Donc :</text:p>
      <text:p text:style-name="Text_20_body">ϕ(n)→+∞ </text:p>
      <text:p text:style-name="Text_20_body">Ça explique <text:span text:style-name="T1">l</text:span>es simulations.</text:p>
      <text:p text:style-name="Horizontal_20_Line"/>
      <text:p text:style-name="Text_20_body"/>
      <text:h text:style-name="P12" text:outline-level="2"><text:soft-page-break/>Signal psychologique → tanh</text:h>
      <text:h text:style-name="P21" text:outline-level="2">Forme retenue</text:h>
      <text:p text:style-name="P14">ρ(n,T)=tanh⁡(n/T)</text:p>
      <text:p text:style-name="Horizontal_20_Line"/>
      <text:h text:style-name="P22" text:outline-level="2">Pourquoi ?</text:h>
      <text:p text:style-name="Text_20_body">On avait comparé :</text:p>
      <text:list text:style-name="L10">
        <text:list-item>
          <text:p text:style-name="P26">linéaire ; </text:p>
        </text:list-item>
        <text:list-item>
          <text:p text:style-name="P26">exponentielle ; </text:p>
        </text:list-item>
        <text:list-item>
          <text:p text:style-name="P26">sigmoïde ; </text:p>
        </text:list-item>
        <text:list-item>
          <text:p text:style-name="P27">tanh. </text:p>
        </text:list-item>
      </text:list>
      <text:p text:style-name="Horizontal_20_Line"/>
      <text:p text:style-name="Text_20_body"><text:span text:style-name="T2">t</text:span>anh car :</text:p>
      <text:h text:style-name="Heading_20_3" text:outline-level="3">(a) Fonction bornée</text:h>
      <text:p text:style-name="Text_20_body">0≤tanh⁡(x)≤10</text:p>
      <text:p text:style-name="Text_20_body">La réactance ne peut pas devenir infinie.</text:p>
      <text:p text:style-name="Horizontal_20_Line"/>
      <text:h text:style-name="Heading_20_3" text:outline-level="3">(b) Non linéaire</text:h>
      <text:p text:style-name="Text_20_body">Faible nudge :</text:p>
      <text:p text:style-name="Text_20_body">→ faible perception.</text:p>
      <text:p text:style-name="Text_20_body">Grand nudge :</text:p>
      <text:p text:style-name="Text_20_body">→ forte perception.</text:p>
      <text:p text:style-name="Horizontal_20_Line"/>
      <text:h text:style-name="Heading_20_3" text:outline-level="3">(c) Saturation</text:h>
      <text:p text:style-name="Text_20_body">À un moment :</text:p>
      <text:p text:style-name="Text_20_body">l'agent sait déjà qu'on le pousse.</text:p>
      <text:p text:style-name="Text_20_body">Rajouter du nudge ne change plus sa perception.</text:p>
      <text:p text:style-name="Horizontal_20_Line"/>
      <text:h text:style-name="P22" text:outline-level="2">Interprétation</text:h>
      <text:p text:style-name="Text_20_body">θitanh⁡(n/T)</text:p>
      <text:p text:style-name="Text_20_body">représente :</text:p>
      <text:p text:style-name="Quotations">coût psychologique du sentiment d'être influencé.</text:p>
      <text:p text:style-name="Text_20_body"><text:soft-page-break/></text:p>
      <text:h text:style-name="P12" text:outline-level="2">Confiance institutionnelle TTT</text:h>
      <text:h text:style-name="P21" text:outline-level="2">Forme retenue</text:h>
      <text:p text:style-name="Text_20_body">T∈(0,1]</text:p>
      <text:p text:style-name="Text_20_body">commune à tous.</text:p>
      <text:p text:style-name="Horizontal_20_Line"/>
      <text:h text:style-name="P22" text:outline-level="2">Pourquoi l'introduire ?</text:h>
      <text:p text:style-name="Text_20_body">Parce que sinon :</text:p>
      <text:p text:style-name="Text_20_body">la réactance dépend uniquement :</text:p>
      <text:list text:style-name="L11">
        <text:list-item>
          <text:p text:style-name="P28">du caractère des agents. </text:p>
        </text:list-item>
      </text:list>
      <text:p text:style-name="Text_20_body">Or ta littérature montrait :</text:p>
      <text:list text:style-name="L12">
        <text:list-item>
          <text:p text:style-name="P29">Falk &amp; Kosfeld ; </text:p>
        </text:list-item>
        <text:list-item>
          <text:p text:style-name="P29">Behavioral Public Policy ; </text:p>
        </text:list-item>
        <text:list-item>
          <text:p text:style-name="P30">littérature confiance. </text:p>
        </text:list-item>
      </text:list>
      <text:p text:style-name="Horizontal_20_Line"/>
      <text:p text:style-name="Text_20_body">Même nudge :</text:p>
      <text:p text:style-name="Text_20_body">→ effets différents selon contexte.</text:p>
      <text:p text:style-name="Horizontal_20_Line"/>
      <text:h text:style-name="P22" text:outline-level="2">Pourquoi exogène ?</text:h>
      <text:p text:style-name="Text_20_body">Parce qu'on voulait :</text:p>
      <text:p text:style-name="Text_20_body">un premier modèle simple.</text:p>
      <text:p text:style-name="Text_20_body">Si :</text:p>
      <text:p text:style-name="Text_20_body">T=T(t)</text:p>
      <text:p text:style-name="Text_20_body">ou</text:p>
      <text:p text:style-name="Text_20_body">Ti</text:p>
      <text:p text:style-name="Text_20_body">on explose déjà la complexité.</text:p>
      <text:p text:style-name="Horizontal_20_Line"/>
      <text:h text:style-name="P22" text:outline-level="2">Interprétation</text:h>
      <text:p text:style-name="Text_20_body">T représente :</text:p>
      <text:list text:style-name="L13">
        <text:list-item>
          <text:p text:style-name="P31">confiance dans l'État ; </text:p>
        </text:list-item>
        <text:list-item>
          <text:p text:style-name="P31"><text:soft-page-break/>légitimité ; </text:p>
        </text:list-item>
        <text:list-item>
          <text:p text:style-name="P31">climat politique ; </text:p>
        </text:list-item>
        <text:list-item>
          <text:p text:style-name="P32">crédibilité.</text:p>
        </text:list-item>
      </text:list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Variable</text:p>
            </table:table-cell>
            <table:table-cell table:style-name="Tableau1.A1" office:value-type="string">
              <text:p text:style-name="Table_20_Heading">Choix</text:p>
            </table:table-cell>
            <table:table-cell table:style-name="Tableau1.A1" office:value-type="string">
              <text:p text:style-name="Table_20_Heading">Idée</text:p>
            </table:table-cell>
          </table:table-row>
        </table:table-header-rows>
        <table:table-row>
          <table:table-cell table:style-name="Tableau1.A1" office:value-type="string">
            <text:p text:style-name="Table_20_Contents">Vi</text:p>
          </table:table-cell>
          <table:table-cell table:style-name="Tableau1.A1" office:value-type="string">
            <text:p text:style-name="Table_20_Contents">Normale tronquée</text:p>
          </table:table-cell>
          <table:table-cell table:style-name="Tableau1.A1" office:value-type="string">
            <text:p text:style-name="Table_20_Contents">Hétérogénéité réaliste</text:p>
          </table:table-cell>
        </table:table-row>
        <table:table-row>
          <table:table-cell table:style-name="Tableau1.A1" office:value-type="string">
            <text:p text:style-name="Table_20_Contents">θi</text:p>
          </table:table-cell>
          <table:table-cell table:style-name="Tableau1.A1" office:value-type="string">
            <text:p text:style-name="Table_20_Contents">Gamma</text:p>
          </table:table-cell>
          <table:table-cell table:style-name="Tableau1.A1" office:value-type="string">
            <text:p text:style-name="Table_20_Contents">Réactance asymétrique</text:p>
          </table:table-cell>
        </table:table-row>
        <table:table-row>
          <table:table-cell table:style-name="Tableau1.A1" office:value-type="string">
            <text:p text:style-name="Table_20_Contents">ϕ(n)</text:p>
          </table:table-cell>
          <table:table-cell table:style-name="Tableau1.A1" office:value-type="string">
            <text:p text:style-name="Table_20_Contents">Log</text:p>
          </table:table-cell>
          <table:table-cell table:style-name="Tableau1.A1" office:value-type="string">
            <text:p text:style-name="Table_20_Contents">Rendements décroissants</text:p>
          </table:table-cell>
        </table:table-row>
        <table:table-row>
          <table:table-cell table:style-name="Tableau1.A1" office:value-type="string">
            <text:p text:style-name="Table_20_Contents">tanh⁡(n/T)</text:p>
          </table:table-cell>
          <table:table-cell table:style-name="Tableau1.A1" office:value-type="string">
            <text:p text:style-name="Table_20_Contents">Saturation psychologique</text:p>
          </table:table-cell>
          <table:table-cell table:style-name="Tableau1.A1" office:value-type="string">
            <text:p text:style-name="P33"/>
          </table:table-cell>
        </table:table-row>
        <table:table-row>
          <table:table-cell table:style-name="Tableau1.A1" office:value-type="string">
            <text:p text:style-name="Table_20_Contents">T</text:p>
          </table:table-cell>
          <table:table-cell table:style-name="Tableau1.A1" office:value-type="string">
            <text:p text:style-name="Table_20_Contents">Paramètre exogène</text:p>
          </table:table-cell>
          <table:table-cell table:style-name="Tableau1.A1" office:value-type="string">
            <text:p text:style-name="Table_20_Contents">Contexte institutionne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1T16:27:34.705000000</meta:creation-date>
    <dc:date>2026-06-11T17:32:11.511000000</dc:date>
    <meta:editing-duration>PT11M27S</meta:editing-duration>
    <meta:editing-cycles>9</meta:editing-cycles>
    <meta:generator>LibreOffice/24.8.0.3$Windows_X86_64 LibreOffice_project/0bdf1299c94fe897b119f97f3c613e9dca6be583</meta:generator>
    <meta:document-statistic meta:table-count="1" meta:image-count="0" meta:object-count="0" meta:page-count="7" meta:paragraph-count="176" meta:word-count="585" meta:character-count="3460" meta:non-whitespace-character-count="3057"/>
  </office:meta>
</office:document-meta>
</file>