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0270" officeooo:paragraph-rsid="00176da7"/>
    </style:style>
    <style:style style:name="P2" style:family="paragraph" style:parent-style-name="Text_20_body">
      <style:text-properties officeooo:paragraph-rsid="00176da7"/>
    </style:style>
    <style:style style:name="P3" style:family="paragraph" style:parent-style-name="Text_20_body">
      <style:text-properties officeooo:rsid="001b2136" officeooo:paragraph-rsid="00176da7"/>
    </style:style>
    <style:style style:name="P4" style:family="paragraph" style:parent-style-name="Standard">
      <style:paragraph-properties fo:break-before="page"/>
      <style:text-properties officeooo:rsid="0035a0fb" officeooo:paragraph-rsid="00176da7"/>
    </style:style>
    <style:style style:name="P5" style:family="paragraph" style:parent-style-name="Standard">
      <style:text-properties officeooo:rsid="0035a0fb" officeooo:paragraph-rsid="00176da7"/>
    </style:style>
    <style:style style:name="P6" style:family="paragraph" style:parent-style-name="Standard">
      <style:text-properties officeooo:rsid="0030f353" officeooo:paragraph-rsid="00176da7"/>
    </style:style>
    <style:style style:name="P7" style:family="paragraph" style:parent-style-name="Standard">
      <style:paragraph-properties fo:text-align="center" style:justify-single-word="false"/>
      <style:text-properties fo:font-size="16pt" fo:font-weight="bold" officeooo:rsid="00208b46" officeooo:paragraph-rsid="00176da7" style:font-size-asian="16pt" style:font-weight-asian="bold" style:font-size-complex="16pt" style:font-weight-complex="bold"/>
    </style:style>
    <style:style style:name="P8" style:family="paragraph" style:parent-style-name="Standard">
      <style:text-properties officeooo:rsid="001e6797" officeooo:paragraph-rsid="00176da7"/>
    </style:style>
    <style:style style:name="P9" style:family="paragraph" style:parent-style-name="Standard" style:list-style-name="L1">
      <style:text-properties officeooo:rsid="00252e95" officeooo:paragraph-rsid="00176da7"/>
    </style:style>
    <style:style style:name="P10" style:family="paragraph" style:parent-style-name="Standard" style:list-style-name="L1">
      <style:text-properties officeooo:paragraph-rsid="00176da7"/>
    </style:style>
    <style:style style:name="P11" style:family="paragraph" style:parent-style-name="Text_20_body" style:list-style-name="L1">
      <style:paragraph-properties fo:margin-top="0cm" fo:margin-bottom="0cm" style:contextual-spacing="false"/>
      <style:text-properties officeooo:paragraph-rsid="00176da7"/>
    </style:style>
    <style:style style:name="P12" style:family="paragraph" style:parent-style-name="Standard" style:list-style-name="L1">
      <style:text-properties officeooo:rsid="001e6797" officeooo:paragraph-rsid="00176da7"/>
    </style:style>
    <style:style style:name="P13" style:family="paragraph" style:parent-style-name="Standard" style:list-style-name="L1">
      <style:text-properties style:text-position="0% 100%" officeooo:rsid="00252e95" officeooo:paragraph-rsid="00176da7"/>
    </style:style>
    <style:style style:name="P14" style:family="paragraph" style:parent-style-name="Standard">
      <style:paragraph-properties fo:break-before="page"/>
      <style:text-properties fo:font-weight="bold" officeooo:rsid="003ee78b" officeooo:paragraph-rsid="00176da7" style:font-weight-asian="bold" style:font-weight-complex="bold"/>
    </style:style>
    <style:style style:name="P15" style:family="paragraph" style:parent-style-name="Standard">
      <style:text-properties officeooo:rsid="003ee78b" officeooo:paragraph-rsid="00176da7"/>
    </style:style>
    <style:style style:name="P16" style:family="paragraph" style:parent-style-name="Standard">
      <style:text-properties officeooo:rsid="0015ef7a" officeooo:paragraph-rsid="00176da7"/>
    </style:style>
    <style:style style:name="P17" style:family="paragraph" style:parent-style-name="Text_20_body" style:list-style-name="L2">
      <style:text-properties officeooo:paragraph-rsid="00176da7"/>
    </style:style>
    <style:style style:name="P18" style:family="paragraph" style:parent-style-name="Text_20_body">
      <style:text-properties officeooo:rsid="001cd6b1" officeooo:paragraph-rsid="00176da7"/>
    </style:style>
    <style:style style:name="P19" style:family="paragraph" style:parent-style-name="Standard">
      <style:text-properties fo:font-style="normal" officeooo:rsid="0015ef7a" officeooo:paragraph-rsid="00176da7" style:font-style-asian="normal" style:font-style-complex="normal"/>
    </style:style>
    <style:style style:name="P20" style:family="paragraph" style:parent-style-name="Standard">
      <style:text-properties fo:font-style="normal" officeooo:rsid="00170a4b" officeooo:paragraph-rsid="00176da7" style:font-style-asian="normal" style:font-style-complex="normal"/>
    </style:style>
    <style:style style:name="P21" style:family="paragraph" style:parent-style-name="Standard">
      <style:text-properties officeooo:rsid="00170a4b" officeooo:paragraph-rsid="00176da7"/>
    </style:style>
    <style:style style:name="P22" style:family="paragraph" style:parent-style-name="Standard">
      <style:text-properties officeooo:paragraph-rsid="00176da7"/>
    </style:style>
    <style:style style:name="P23" style:family="paragraph" style:parent-style-name="Standard">
      <style:text-properties fo:font-style="normal" style:text-underline-style="none" officeooo:rsid="0017a0be" officeooo:paragraph-rsid="00176da7" style:font-style-asian="normal" style:font-style-complex="normal"/>
    </style:style>
    <style:style style:name="P24" style:family="paragraph" style:parent-style-name="Standard">
      <style:text-properties fo:font-style="normal" officeooo:rsid="0017a0be" officeooo:paragraph-rsid="00176da7" style:font-style-asian="normal" style:font-style-complex="normal"/>
    </style:style>
    <style:style style:name="P25" style:family="paragraph" style:parent-style-name="Standard">
      <style:text-properties officeooo:rsid="0017a0be" officeooo:paragraph-rsid="00176da7"/>
    </style:style>
    <style:style style:name="P26" style:family="paragraph" style:parent-style-name="Text_20_body">
      <style:text-properties fo:font-style="normal" officeooo:rsid="0017a0be" officeooo:paragraph-rsid="00176da7" style:font-style-asian="normal" style:font-style-complex="normal"/>
    </style:style>
    <style:style style:name="P27" style:family="paragraph" style:parent-style-name="Standard">
      <style:text-properties style:text-position="0% 100%" officeooo:rsid="0017a0be" officeooo:paragraph-rsid="00176da7"/>
    </style:style>
    <style:style style:name="P28" style:family="paragraph" style:parent-style-name="Standard">
      <style:text-properties fo:font-weight="bold" officeooo:rsid="003ee78b" officeooo:paragraph-rsid="00176da7" style:font-weight-asian="bold" style:font-weight-complex="bold"/>
    </style:style>
    <style:style style:name="P29" style:family="paragraph" style:parent-style-name="Standard">
      <style:paragraph-properties fo:break-before="page"/>
      <style:text-properties officeooo:paragraph-rsid="00176da7"/>
    </style:style>
    <style:style style:name="P30" style:family="paragraph" style:parent-style-name="Standard">
      <style:text-properties style:text-position="0% 100%" fo:font-style="normal" officeooo:rsid="00230ce9" officeooo:paragraph-rsid="00176da7" style:font-style-asian="normal" style:font-style-complex="normal"/>
    </style:style>
    <style:style style:name="P31" style:family="paragraph" style:parent-style-name="Standard">
      <style:text-properties style:text-position="0% 100%" fo:font-style="normal" officeooo:rsid="00190634" officeooo:paragraph-rsid="00176da7" style:font-style-asian="normal" style:font-style-complex="normal"/>
    </style:style>
    <style:style style:name="P32" style:family="paragraph" style:parent-style-name="Text_20_body">
      <style:text-properties officeooo:rsid="00190634" officeooo:paragraph-rsid="00176da7"/>
    </style:style>
    <style:style style:name="P33" style:family="paragraph" style:parent-style-name="Text_20_body">
      <style:text-properties fo:font-style="normal" officeooo:rsid="00230ce9" officeooo:paragraph-rsid="00176da7" style:font-style-asian="normal" style:font-style-complex="normal"/>
    </style:style>
    <style:style style:name="P34" style:family="paragraph" style:parent-style-name="Text_20_body" style:list-style-name="L3">
      <style:text-properties officeooo:paragraph-rsid="00176da7"/>
    </style:style>
    <style:style style:name="P35" style:family="paragraph" style:parent-style-name="Text_20_body">
      <style:text-properties officeooo:rsid="001a044f" officeooo:paragraph-rsid="00176da7"/>
    </style:style>
    <style:style style:name="T1" style:family="text">
      <style:text-properties officeooo:rsid="001f2961"/>
    </style:style>
    <style:style style:name="T2" style:family="text">
      <style:text-properties officeooo:rsid="002af740"/>
    </style:style>
    <style:style style:name="T3" style:family="text">
      <style:text-properties officeooo:rsid="0023fd50"/>
    </style:style>
    <style:style style:name="T4" style:family="text">
      <style:text-properties officeooo:rsid="001e05c8"/>
    </style:style>
    <style:style style:name="T5" style:family="text">
      <style:text-properties officeooo:rsid="001c5763"/>
    </style:style>
    <style:style style:name="T6" style:family="text">
      <style:text-properties officeooo:rsid="0019f9e5"/>
    </style:style>
    <style:style style:name="T7" style:family="text">
      <style:text-properties officeooo:rsid="002b6a9e"/>
    </style:style>
    <style:style style:name="T8" style:family="text">
      <style:text-properties fo:font-weight="normal" officeooo:rsid="0019f9e5" style:font-weight-asian="normal" style:font-weight-complex="normal"/>
    </style:style>
    <style:style style:name="T9" style:family="text">
      <style:text-properties officeooo:rsid="001b12c0"/>
    </style:style>
    <style:style style:name="T10" style:family="text">
      <style:text-properties officeooo:rsid="00299f29"/>
    </style:style>
    <style:style style:name="T11" style:family="text">
      <style:text-properties officeooo:rsid="001b2136"/>
    </style:style>
    <style:style style:name="T12" style:family="text">
      <style:text-properties officeooo:rsid="002c5bde"/>
    </style:style>
    <style:style style:name="T13" style:family="text">
      <style:text-properties officeooo:rsid="002feebb"/>
    </style:style>
    <style:style style:name="T14" style:family="text">
      <style:text-properties officeooo:rsid="003bbb28"/>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8883d" style:font-style-asian="normal" style:font-style-complex="normal"/>
    </style:style>
    <style:style style:name="T18" style:family="text">
      <style:text-properties fo:font-style="normal" officeooo:rsid="0039f04e" style:font-style-asian="normal" style:font-style-complex="normal"/>
    </style:style>
    <style:style style:name="T19" style:family="text">
      <style:text-properties fo:font-style="normal" officeooo:rsid="003c23c5" style:font-style-asian="normal" style:font-style-complex="normal"/>
    </style:style>
    <style:style style:name="T20" style:family="text">
      <style:text-properties fo:font-style="normal" officeooo:rsid="0030dd42" style:font-style-asian="normal" style:font-style-complex="normal"/>
    </style:style>
    <style:style style:name="T21" style:family="text">
      <style:text-properties style:text-position="sub 58%" fo:font-style="normal" officeooo:rsid="0030dd42" style:font-style-asian="normal" style:font-style-complex="normal"/>
    </style:style>
    <style:style style:name="T22" style:family="text">
      <style:text-properties fo:font-style="normal" officeooo:rsid="001e6797" style:font-style-asian="normal" style:font-style-complex="normal"/>
    </style:style>
    <style:style style:name="T23" style:family="text">
      <style:text-properties style:text-position="sub 58%" fo:font-style="normal" officeooo:rsid="001e6797" style:font-style-asian="normal" style:font-style-complex="normal"/>
    </style:style>
    <style:style style:name="T24" style:family="text">
      <style:text-properties fo:font-style="normal" officeooo:rsid="003dbb84" style:font-style-asian="normal" style:font-style-complex="normal"/>
    </style:style>
    <style:style style:name="T25" style:family="text">
      <style:text-properties style:text-position="sub 58%" fo:font-style="normal" officeooo:rsid="003dbb84" style:font-style-asian="normal" style:font-style-complex="normal"/>
    </style:style>
    <style:style style:name="T26" style:family="text">
      <style:text-properties style:text-position="sub 58%"/>
    </style:style>
    <style:style style:name="T27" style:family="text">
      <style:text-properties officeooo:rsid="001e6797"/>
    </style:style>
    <style:style style:name="T28" style:family="text">
      <style:text-properties style:text-position="sub 58%" officeooo:rsid="001e6797"/>
    </style:style>
    <style:style style:name="T29" style:family="text">
      <style:text-properties officeooo:rsid="0020e11f"/>
    </style:style>
    <style:style style:name="T30" style:family="text">
      <style:text-properties officeooo:rsid="0035a0fb"/>
    </style:style>
    <style:style style:name="T31" style:family="text">
      <style:text-properties officeooo:rsid="00252e95"/>
    </style:style>
    <style:style style:name="T32" style:family="text">
      <style:text-properties officeooo:rsid="001eba98"/>
    </style:style>
    <style:style style:name="T33" style:family="text">
      <style:text-properties style:text-position="0% 100%" officeooo:rsid="0035a0fb"/>
    </style:style>
    <style:style style:name="T34" style:family="text">
      <style:text-properties style:text-position="0% 100%" officeooo:rsid="00252e95"/>
    </style:style>
    <style:style style:name="T35" style:family="text">
      <style:text-properties fo:font-style="normal" officeooo:rsid="0015ef7a" style:font-style-asian="normal" style:font-style-complex="normal"/>
    </style:style>
    <style:style style:name="T36" style:family="text">
      <style:text-properties fo:font-style="normal" style:text-underline-style="none" officeooo:rsid="00170a4b" style:font-style-asian="normal" style:font-style-complex="normal"/>
    </style:style>
    <style:style style:name="T37" style:family="text">
      <style:text-properties fo:font-style="normal" style:text-underline-style="none" officeooo:rsid="0015ef7a" style:font-style-asian="normal" style:font-style-complex="normal"/>
    </style:style>
    <style:style style:name="T38" style:family="text">
      <style:text-properties fo:font-style="normal" officeooo:rsid="001cd6b1" style:font-style-asian="normal" style:font-style-complex="normal"/>
    </style:style>
    <style:style style:name="T39" style:family="text">
      <style:text-properties officeooo:rsid="001cd6b1"/>
    </style:style>
    <style:style style:name="T40" style:family="text">
      <style:text-properties fo:font-style="normal" officeooo:rsid="00170a4b" style:font-style-asian="normal" style:font-style-complex="normal"/>
    </style:style>
    <style:style style:name="T41" style:family="text">
      <style:text-properties fo:font-style="normal" style:text-underline-style="none" officeooo:rsid="0017a0be" style:font-style-asian="normal" style:font-style-complex="normal"/>
    </style:style>
    <style:style style:name="T42" style:family="text">
      <style:text-properties officeooo:rsid="0017a0be"/>
    </style:style>
    <style:style style:name="T43" style:family="text">
      <style:text-properties style:text-position="0% 100%" fo:font-style="normal" officeooo:rsid="0017a0be" style:font-style-asian="normal" style:font-style-complex="normal"/>
    </style:style>
    <style:style style:name="T44" style:family="text">
      <style:text-properties style:text-position="0% 100%" fo:font-style="normal" style:text-underline-style="none" officeooo:rsid="0015ef7a" style:font-style-asian="normal" style:font-style-complex="normal"/>
    </style:style>
    <style:style style:name="T45" style:family="text">
      <style:text-properties style:text-position="0% 100%" fo:font-style="normal" style:text-underline-style="none" officeooo:rsid="0017a0be" style:font-style-asian="normal" style:font-style-complex="normal"/>
    </style:style>
    <style:style style:name="T46" style:family="text">
      <style:text-properties style:text-position="0% 100%" fo:font-style="normal" style:text-underline-style="none" officeooo:rsid="001e6797" style:font-style-asian="normal" style:font-style-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bold" officeooo:rsid="003ee78b" style:font-style-asian="normal" style:font-weight-asian="bold" style:font-style-complex="normal" style:font-weight-complex="bold"/>
    </style:style>
    <style:style style:name="T49" style:family="text">
      <style:text-properties fo:font-style="normal" style:text-underline-style="none" fo:font-weight="bold" officeooo:rsid="0017ff18" style:font-style-asian="normal" style:font-weight-asian="bold" style:font-style-complex="normal" style:font-weight-complex="bold"/>
    </style:style>
    <style:style style:name="T50" style:family="text">
      <style:text-properties fo:font-style="normal" style:text-underline-style="none" officeooo:rsid="0017ff18" style:font-style-asian="normal" style:font-style-complex="normal"/>
    </style:style>
    <style:style style:name="T51" style:family="text">
      <style:text-properties fo:font-style="normal" officeooo:rsid="0017a0be" style:font-style-asian="normal" style:font-style-complex="normal"/>
    </style:style>
    <style:style style:name="T52" style:family="text">
      <style:text-properties fo:font-style="normal" officeooo:rsid="00190634" style:font-style-asian="normal" style:font-style-complex="normal"/>
    </style:style>
    <style:style style:name="T53" style:family="text">
      <style:text-properties style:text-position="sub 58%" fo:font-style="normal" style:font-style-asian="normal" style:font-style-complex="normal"/>
    </style:style>
    <style:style style:name="T54" style:family="text">
      <style:text-properties fo:font-style="normal" officeooo:rsid="001a044f" style:font-style-asian="normal" style:font-style-complex="normal"/>
    </style:style>
    <style:style style:name="T55" style:family="text">
      <style:text-properties officeooo:rsid="001a044f"/>
    </style:style>
    <style:style style:name="T56" style:family="text">
      <style:text-properties officeooo:rsid="00190634"/>
    </style:style>
    <style:style style:name="T57" style:family="text">
      <style:text-properties officeooo:rsid="00230ce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s politiques publiques mobilisent depuis longtemps un large éventail d’instruments visant à orienter les comportements individuels dans un sens jugé socialement désirable. </text:span><text:span text:style-name="T2">U</text:span>ne grande majorité <text:span text:style-name="T2">de celles-ci sont</text:span><text:span text:style-name="T1"> fondées sur des règles contraignantes assorties de sanctions ou d’incitations financières explicites. </text:span><text:span text:style-name="T2">Cependant, i</text:span>l existe <text:span text:style-name="T3">aussi</text:span> des <text:span text:style-name="T4">approches mettant en œuvre des </text:span>mécanismes <text:span text:style-name="T4">issus</text:span> <text:span text:style-name="T4">de</text:span> la recherche en sciences comportementales qui s’appuient sur les biais cognitifs des agents pour les guider sans les contraindre vers une action : les Nudges ou paternalisme libertarien. <text:span text:style-name="T2">Popularisés par</text:span> Richard H. Thaler et Cass <text:span text:style-name="T5">R. </text:span>Sunstein <text:span text:style-name="T2">les </text:span>« Nudge<text:span text:style-name="T2">s</text:span> » <text:span text:style-name="T2">se veulent être d</text:span>es mécanismes dans l<text:span text:style-name="T2">esq</text:span>uel<text:span text:style-name="T2">s</text:span> les libertés sont préservées et les bonnes décisions sont intelligemment suggérées. </text:p>
      <text:p text:style-name="P1"/>
      <text:p text:style-name="P2">De nombreux travaux empiriques ont montré que ces dispositifs pouvaient, dans certains contextes, améliorer significativement les taux d’adoption de comportements jugés souhaitables. Toutefois, <text:span text:style-name="T6"><text:s/>nous avons </text:span><text:span text:style-name="T7">aujourd’hui </text:span><text:span text:style-name="T6">suffisamment de recul pour remettre en question l’efficacité de ces mécanismes.</text:span> <text:span text:style-name="T7">U</text:span>n constat récurrent s’impose : les effets des nudges apparaissent souvent hétérogènes, limités dans le temps, voire contre-productifs pour une partie de la population. Dans plusieurs cas, l’introduction d’un nudge s’accompagne d’un phénomène de rejet ou de résistance active, y compris lorsque l’action recommandée est peu coûteuse individuellement et bénéfique collectivement. Ce constat soulève une question centrale : <text:span text:style-name="Strong_20_Emphasis">pourquoi des dispositifs conçus pour préserver la liberté de choix génèrent-ils néanmoins une opposition persistante et parfois croissante ?</text:span></text:p>
      <text:p text:style-name="P2"><text:span text:style-name="Strong_20_Emphasis"><text:span text:style-name="T8">De nombreux travaux ont, par ailleurs, tentés de modéliser et de comprendre tout ou partie des biais qui viennent perturber le bon fonctionnement des nudges. Par exemple, nous savons que les individus ne maximisent pas uniquement une utilité matérielle, mais cherchent également à agir en cohérence avec une image de soi ou une appartenance sociale donnée (Akerlof et Kranton). Dans cette perspective, suivre une recommandation externe peut être perçu comme incompatible avec certaines identités, réduisant ainsi l’attrait de l’action proposée. D’autres contributions soulignent le rôle des incitations et de la réputation dans les comportements prosociaux : une intervention externe peut modifier la signification morale d’une action et en réduire la motivation intrinsèque, phénomène souvent qualifié de </text:span></text:span><text:span text:style-name="Emphasis"><text:span text:style-name="T8">crowding-out</text:span></text:span><text:span text:style-name="Strong_20_Emphasis"><text:span text:style-name="T8"> (Bénabou et Tirole). Enfin, des travaux expérimentaux mettent en évidence qu’un Nudge peut aussi être un signal de contrôle et être interprété négativement par un agent pour qui la liberté de choix est importante. Toute forme de contrôle représente un coût supplémentaire qui vient contrebalancer les bénéfices retirés d’un acte ou d’une décision (Falk et Kosfeld).</text:span></text:span></text:p>
      <text:p text:style-name="P2"><text:span text:style-name="T7">Plus récemment,</text:span><text:span text:style-name="T9"> Lowenstein et Chater font état de l’approche individualiste de certaines politiques publiques comme les Nudges. Ils présentent ce type d’outils comme des mécanismes qui responsabilisent trop les agents sans pour autant, leur expliquer en quoi leur décision à un impact à une échelle plus grande. C’est la différence entre ce qu’ils appellent le i-frame (pour individuel, qui culpabilise plus l’agent qu’autre chose) et le s-frame (pour syst</text:span><text:span text:style-name="T10">è</text:span><text:span text:style-name="T9">m</text:span><text:span text:style-name="T10">e</text:span><text:span text:style-name="T9">, qui donne les raisons du besoin de changement systémique </text:span><text:span text:style-name="T1">et qui impacte la société dans son ensemble et plus seulement les agents un à un</text:span><text:span text:style-name="T9">).</text:span> L’ensemble de ces travaux converge vers une idée commune : <text:span text:style-name="Strong_20_Emphasis">les interventions comportementales peuvent générer des coûts psychologiques endogènes, induits par l’intervention elle-même</text:span>, et non uniquement par l’action recommandée.</text:p>
      <text:p text:style-name="P2"><text:soft-page-break/><text:span text:style-name="T9">Tous ces freins au bon fonctionnement des politiques publiques peuvent être intégrer à la notion de réactance </text:span><text:span text:style-name="T1">introduite</text:span><text:span text:style-name="T9"> par Brehm en 1966 et qui représente les motivations pour lesquelles des agents pourraient être amenés à ne pas se conformer à certaines actions. Cette notion de réactance nous permet </text:span><text:span text:style-name="T7">d’affirmer</text:span><text:span text:style-name="T9"> que ces agents </text:span>restent rationnels au sens de la maximisation d’une utilité élargie<text:span text:style-name="T9">. </text:span><text:span text:style-name="T7">C</text:span><text:span text:style-name="T1">es coûts apparaissent comme rationnels si nous considérons que chaque agent d’une population avec des préférences hétérogènes, cherche à maximiser son utilité en prenant en compte tous les éléments exogènes.</text:span></text:p>
      <text:p text:style-name="P2"><text:span text:style-name="T11">Tous ces travaux ont permis de mettre en lumière différents problèmes pouvant affecter les politiques publiques. </text:span>À notre connaissance, il n’existe pas de cadre formel unifié permettant d’analyser conjointement identité, contrôle perçu et réactance dans l’évaluation de l’efficacité des nudges.<text:span text:style-name="T11"> </text:span><text:span text:style-name="T1">Il nous paraît pertinent de joindre l’aspect psychologique qui altèrent les coûts liés à une décision dans une population et l’aspect économique sur la pertinence et la réussite d’une politique publique.</text:span></text:p>
      <text:p text:style-name="P3">Dans cet article, nous <text:span text:style-name="T7">proposons un</text:span> mod<text:span text:style-name="T7">è</text:span>l<text:span text:style-name="T7">e</text:span> <text:span text:style-name="T7">formel autour d</text:span>es décisions des agents <text:span text:style-name="T7">en </text:span>intégrant la réactance comme fonction liée à l’autonomie et à la confiance institutionnelle. Les agents sont hétérogènes dans leur sensibilité <text:span text:style-name="T12">aux</text:span> coût<text:span text:style-name="T12">s liés à une politique publique</text:span>, lequel dépend notamment de l’intensité de l’intervention et de facteurs institutionnels tels que la confiance. </text:p>
      <text:p text:style-name="P2"><text:span text:style-name="T11">A travers ce modèle, nous </text:span><text:span text:style-name="T12">montrons</text:span><text:span text:style-name="T11"> comment réagit un groupe en fonction de la force de la réactance et des éléments qui l’a compose, ainsi, nous </text:span><text:span text:style-name="T12">observons</text:span><text:span text:style-name="T11"> l’application et les probabilités de réussite d’une politique publique. Nous </text:span><text:span text:style-name="T12">mobilisons ensuite le modèle dans un cadre de la théorie des jeux afin d’</text:span><text:span text:style-name="T13">analyser</text:span><text:span text:style-name="T12"> </text:span>l’interaction entre une autorité publique et une population d’agents hétérogènes. </text:p>
      <text:p text:style-name="P2">Ces résultats apportent des implications importantes pour la conception des politiques publiques et invitent à repenser le rôle et les limites des nudges dans des contextes caractérisés par une forte hétérogénéité des préférences et des perceptions.</text:p>
      <text:p text:style-name="P2"/>
      <text:p text:style-name="P2"/>
      <text:p text:style-name="P4"><text:span text:style-name="T14">N</text:span>ous posons un jeu dans lequel un agent <text:span text:style-name="T15">i</text:span> a le choix d’effectuer une action <text:span text:style-name="T15">s</text:span><text:span text:style-name="T16">. Cette action est mise en place par une institution publique qui </text:span><text:span text:style-name="T17">utilise</text:span><text:span text:style-name="T16"> une </text:span><text:span text:style-name="T18">intervention</text:span><text:span text:style-name="T16"> pour inciter les agents à effectuer cette action (a = 1 </text:span><text:span text:style-name="T19">sachant que </text:span><text:span text:style-name="T20">a</text:span><text:span text:style-name="T21">i</text:span><text:span text:style-name="T20"> = 1 </text:span><text:span text:style-name="T16">si et seulement si</text:span><text:span text:style-name="T20"> V</text:span><text:span text:style-name="T21">i</text:span><text:span text:style-name="T20"> ≥ c – </text:span><text:span text:style-name="T22">ø</text:span><text:span text:style-name="T20">(n) + </text:span><text:span text:style-name="T22">θ</text:span><text:span text:style-name="T23">i</text:span><text:span text:style-name="T20">tanh(n/T) </text:span><text:span text:style-name="T24">ou U</text:span><text:span text:style-name="T25">i</text:span><text:span text:style-name="T24">(1) ≥ 0</text:span><text:span text:style-name="T19">)</text:span><text:span text:style-name="T16">.</text:span></text:p>
      <text:p text:style-name="P5"><text:span text:style-name="T16">Pour chaque agent </text:span><text:span text:style-name="T15">i</text:span><text:span text:style-name="T16">, nous définissons une fonction d’utilité</text:span><text:span text:style-name="T15"> U </text:span><text:span text:style-name="T16">telle que :</text:span></text:p>
      <text:p text:style-name="P6"/>
      <text:p text:style-name="P7">U<text:span text:style-name="T26">i</text:span>(a) = a * [ V<text:span text:style-name="T26">i</text:span> – ( c – <text:span text:style-name="T27">ø(n)</text:span>) - <text:span text:style-name="T27">θ</text:span><text:span text:style-name="T28">i</text:span><text:span text:style-name="T27"> </text:span>* tanh(<text:span text:style-name="T29">n/T) ]</text:span></text:p>
      <text:p text:style-name="P7"/>
      <text:p text:style-name="P8"><text:span text:style-name="T30">où</text:span> : </text:p>
      <text:list text:style-name="L1">
        <text:list-item>
          <text:p text:style-name="P9">a <text:span text:style-name="T30">est un</text:span> paramètre binaire {0,1} </text:p>
        </text:list-item>
        <text:list-item>
          <text:p text:style-name="P9">V<text:span text:style-name="T26">i</text:span> <text:span text:style-name="T30">représente les</text:span> motivation<text:span text:style-name="T30">s </text:span>intrinsèque<text:span text:style-name="T30">s hétérogènes des agents via une d</text:span>istribution normale tronquée</text:p>
        </text:list-item>
        <text:list-item>
          <text:p text:style-name="P9">c <text:span text:style-name="T30">est le</text:span> coût de base fixe</text:p>
        </text:list-item>
        <text:list-item>
          <text:p text:style-name="P10"><text:span text:style-name="T27">ø(n) </text:span><text:span text:style-name="T30">est l’</text:span><text:span text:style-name="T31">efficacité du nudge tel</text:span><text:span text:style-name="T30">le</text:span><text:span text:style-name="T31"> que </text:span></text:p>
          <text:list>
            <text:list-item>
              <text:p text:style-name="P10"><text:span text:style-name="T27">ø(n) </text:span><text:span text:style-name="T32">= γ ln(1+n)</text:span><text:span text:style-name="T31"> </text:span></text:p>
            </text:list-item>
            <text:list-item>
              <text:p text:style-name="P10"><text:span text:style-name="T27">ø</text:span>(0)=0</text:p>
            </text:list-item>
            <text:list-item>
              <text:p text:style-name="P11"><text:span text:style-name="T27">ø</text:span>′(n)&gt;0 (efficacité croissante) </text:p>
            </text:list-item>
            <text:list-item>
              <text:p text:style-name="P11"><text:span text:style-name="T27">ø</text:span>′′(n)&lt;0 (rendements décroissants) </text:p>
            </text:list-item>
          </text:list>
        </text:list-item>
        <text:list-item>
          <text:p text:style-name="P12">θ<text:span text:style-name="T26">i </text:span><text:span text:style-name="T33">est la </text:span><text:span text:style-name="T34">sensibilité à la réactance </text:span><text:span text:style-name="T33">et suit une d</text:span><text:span text:style-name="T34">istribution Gamma </text:span></text:p>
        </text:list-item>
        <text:list-item>
          <text:p text:style-name="P13">tanh(n/T) <text:span text:style-name="T30">est le</text:span> signal de réactance. Fonction non linéaire.</text:p>
        </text:list-item>
        <text:list-item>
          <text:p text:style-name="P13">T <text:span text:style-name="T30">représente la</text:span> confiance institutionnelle </text:p>
        </text:list-item>
      </text:list>
      <text:p text:style-name="P14">Proposition 1 : <text:span text:style-name="Strong_20_Emphasis">Seuil individuel et sélection par la réactance.</text:span></text:p>
      <text:p text:style-name="P15"/>
      <text:p text:style-name="P2">Soit un agent <text:span text:style-name="T15">i</text:span> caractérisé par une motivation intrinsèque V<text:span text:style-name="T26">i</text:span>​ et un paramètre de sensibilité à l’autonomie <text:span text:style-name="T22">θ</text:span><text:span text:style-name="T23">i</text:span>≥0.</text:p>
      <text:p text:style-name="P2">Pour tout niveau d’intensité du nudge n ≥ 0, il existe un seuil d’adoption :</text:p>
      <text:p text:style-name="P16"><text:span text:style-name="T16">S(n,</text:span><text:span text:style-name="T22">θ</text:span><text:span text:style-name="T23">i</text:span><text:span text:style-name="T16">) = </text:span><text:span text:style-name="T20">c – </text:span><text:span text:style-name="T22">ø</text:span><text:span text:style-name="T20">(n) + </text:span><text:span text:style-name="T22">θ</text:span><text:span text:style-name="T23">i</text:span><text:span text:style-name="T20">tanh(n/T)</text:span></text:p>
      <text:p text:style-name="P16"><text:span text:style-name="T20"/></text:p>
      <text:p text:style-name="P2">tel que l’agent adopte l’action si et seulement si :</text:p>
      <text:p text:style-name="P2">V<text:span text:style-name="T26">i </text:span>≥ <text:span text:style-name="T35">S(n,</text:span><text:span text:style-name="T22">θ</text:span><text:span text:style-name="T23">i</text:span><text:span text:style-name="T35">)</text:span> </text:p>
      <text:p text:style-name="P2">De plus, il existe un seuil critique de sensibilité :</text:p>
      <text:p text:style-name="P2">θˉ(n) = <text:span text:style-name="T36">( </text:span><text:span text:style-name="T37">γ</text:span><text:span text:style-name="T36">T)/ [(1+n)(1−tanh</text:span><text:span text:style-name="T37">²</text:span><text:span text:style-name="T36">(n/T)]</text:span></text:p>
      <text:p text:style-name="P2">tel que :</text:p>
      <text:list text:style-name="L2">
        <text:list-item>
          <text:p text:style-name="P17">si θ<text:span text:style-name="T26">i </text:span>&lt; θˉ(n), l’effet marginal du nudge est favorable à l’adoption ;</text:p>
        </text:list-item>
        <text:list-item>
          <text:p text:style-name="P17">si θ<text:span text:style-name="T26">i </text:span>&gt; θˉ(n), l’effet marginal du nudge devient défavorable pour l’agent.</text:p>
        </text:list-item>
      </text:list>
      <text:p text:style-name="P2">Ainsi, le modèle génère un mécanisme endogène de tri comportemental :<text:line-break/>à mesure que n augmente, les agents faiblement sensibles à l’autonomie restent dans la population des adoptants, tandis que les agents fortement réactifs peuvent en sortir.</text:p>
      <text:p text:style-name="P18">a. Preuve</text:p>
      <text:p text:style-name="P2">On dérive le seuil d’adoption par rapport à n :</text:p>
      <text:p text:style-name="P2"><text:span text:style-name="T35">∂S/∂n = </text:span><text:span text:style-name="T16">−</text:span><text:span text:style-name="T35">(γ/(</text:span><text:span text:style-name="T16">1+n</text:span><text:span text:style-name="T35">))</text:span><text:span text:style-name="T16">+</text:span><text:span text:style-name="T35">(</text:span><text:span text:style-name="T16">θi/</text:span><text:span text:style-name="T35">T)</text:span><text:span text:style-name="T16">(1−tanh</text:span><text:span text:style-name="T35">²</text:span><text:span text:style-name="T16">(n/T)) </text:span></text:p>
      <text:p text:style-name="P2">Le premier terme est négatif (effet matériel du nudge).<text:line-break/>Le second est positif (coût psychologique marginal).</text:p>
      <text:p text:style-name="P2">L’effet marginal du nudge sur le seuil est donc négatif si et seulement si :</text:p>
      <text:p text:style-name="P2"><text:span text:style-name="T35">(</text:span><text:span text:style-name="T16">θi/</text:span><text:span text:style-name="T35">T)</text:span><text:span text:style-name="T16">(1−tanh</text:span><text:span text:style-name="T35">²</text:span><text:span text:style-name="T16">(n/T)) </text:span>&lt; <text:span text:style-name="T35">γ/(</text:span><text:span text:style-name="T16">1+n</text:span><text:span text:style-name="T35">)</text:span></text:p>
      <text:p text:style-name="P2">ce qui définit le seuil critique θˉ(n).</text:p>
      <text:p text:style-name="P18">b. Discussion</text:p>
      <text:p text:style-name="P16"><text:span text:style-name="T38">L</text:span><text:span text:style-name="T16">e seuil S(n,</text:span><text:span text:style-name="T22">θ</text:span><text:span text:style-name="T23">i</text:span><text:span text:style-name="T16">) représente le niveau de motivation intrinsèque minimum de l’agent i pour qu’il adopte l’action. Ainsi, plus le seuil est élevé, plus l’adoption est difficile. </text:span><text:span text:style-name="T38"><text:s/>Deux effets impactent ce seuil :</text:span></text:p>
      <text:p text:style-name="P19"/>
      <text:p text:style-name="P19"><text:tab/>b.<text:span text:style-name="T39">1</text:span>. L’effet matériel (positif pour l’adoption) −(γ/(1+n))</text:p>
      <text:p text:style-name="P16"><text:span text:style-name="T16"/></text:p>
      <text:p text:style-name="P16"><text:span text:style-name="T16">Cet effet agit positivement sur l’adoption </text:span><text:span text:style-name="T40">(signe négatif) en réduisant le seuil. Il représente l’effet du Nudge ou de la politique publique qui vient diminuer les coût et les effets des freins sur les agents rendant l’action plus accessible, moins chronophage, etc...</text:span></text:p>
      <text:p text:style-name="P20">Cet effet décroît avec n. Lorsque n est grand, c’est à dire, lorsque le nudge est plus fort, son effet positif est de moins en moins grand symbolisant les rendements décroissants de la politique publique ou du nudge.</text:p>
      <text:p text:style-name="P21"><text:span text:style-name="T16"/></text:p>
      <text:p text:style-name="P21"><text:span text:style-name="T16"><text:tab/>b.</text:span><text:span text:style-name="T38">2.</text:span><text:span text:style-name="T16"> L’effet psychologique (négatif pour l’adoption) </text:span><text:span text:style-name="T35">(</text:span><text:span text:style-name="T16">θi/</text:span><text:span text:style-name="T35">T)</text:span><text:span text:style-name="T16">(1−tanh</text:span><text:span text:style-name="T35">²</text:span><text:span text:style-name="T16">(n/T)) </text:span></text:p>
      <text:p text:style-name="P21"><text:soft-page-break/><text:span text:style-name="T16"/></text:p>
      <text:p text:style-name="P20">Cet effet au signe positif a un effet inverse sur le seuil, il augmente le seuil et représente les effets intrinsèques à l’agent (sa confiance en l’état, sa réactance etc.).</text:p>
      <text:p text:style-name="P22"><text:span text:style-name="T40">Cet effet dépend de chaque individu et de son tempérament. </text:span>La réactance est borné et décroît lorsque n augmente, bien que le niveau total de réactance converge vers <text:span text:style-name="T40">θi, c’est à dire que plus la politique publique ou le nudge est fort moins cet effet a d’impact.</text:span></text:p>
      <text:p text:style-name="P20"/>
      <text:p text:style-name="P21"><text:span text:style-name="T16"/></text:p>
      <text:p text:style-name="P22"><text:span text:style-name="T40">Le résultat de cette première proposition est l’existence d’un seuil de réactance. </text:span><text:span text:style-name="T36">Pour un niveau donné de n </text:span><text:span text:style-name="T41">l</text:span>es agents avec θi&gt;θˉ(n) subissent un effet marginal négatif du nudge <text:span text:style-name="T42">i.e. l</text:span>e nudge devient contre-productif pour eux.</text:p>
      <text:p text:style-name="P23"/>
      <text:p text:style-name="P23">On en déduit la chose suivante : </text:p>
      <text:p text:style-name="P22"><text:span text:style-name="T41">- </text:span>Le seuil critique θ̄(n) définit une frontière dans l’espace des types.<text:line-break/>L’augmentation de n modifie la composition des adoptants en excluant progressivement les agents à forte sensibilité. </text:p>
      <text:p text:style-name="P24">Le modèle génère un tri comportemental endogène.</text:p>
      <text:p text:style-name="P25"><text:span text:style-name="T16"/></text:p>
      <text:p text:style-name="P24"><text:span text:style-name="T39">c</text:span>. Analyse des cas limites</text:p>
      <text:p text:style-name="P25"><text:span text:style-name="T16"/></text:p>
      <text:p text:style-name="P26">Quand n → 0 : modèle standard coût–motivation</text:p>
      <text:p text:style-name="P2">Quand n → ∞ : modèle dominé par la réactance</text:p>
      <text:p text:style-name="P27"><text:span text:style-name="T16"/></text:p>
      <text:p text:style-name="P22"><text:span text:style-name="T43">Notre modèle montre que l’effet du nudge dépend des paramètres (</text:span><text:span text:style-name="T44">γ, </text:span><text:span text:style-name="T45">T) c’est à dire des rendements de l’action publique et de la confiance des agents dans les institutions. Il va également dépendre de la distribution </text:span><text:span text:style-name="T46">θi. </text:span><text:span text:style-name="T45">L’inefficacité potentielle n’est pas automatique et chaque agent a son propre point de bascule (seuil S). La Proposition 1 établit que l’intensification d’un nudge ne modifie pas uniquement le niveau d’adoption, mais également la composition des adoptants. </text:span></text:p>
      <text:p text:style-name="P27"><text:span text:style-name="T47"/></text:p>
      <text:p text:style-name="P27"><text:span text:style-name="T47"/></text:p>
      <text:p text:style-name="P27"><text:span text:style-name="T47"/></text:p>
      <text:p text:style-name="P28"><text:span text:style-name="T47"/></text:p>
      <text:p text:style-name="P29"><text:span text:style-name="T48">Proposition </text:span><text:span text:style-name="T49">2</text:span><text:span text:style-name="T48"> : </text:span><text:span text:style-name="T50">Évolution agrégée de l’adoption </text:span></text:p>
      <text:p text:style-name="P27"><text:span text:style-name="T16"/></text:p>
      <text:p text:style-name="P30">Soit la part des agents qui adoptent une action :</text:p>
      <text:p text:style-name="P31"/>
      <text:p text:style-name="P2">P(n) = P( V<text:span text:style-name="T26">i</text:span> ≥ S(n, θ<text:span text:style-name="T26">i</text:span>) )</text:p>
      <text:p text:style-name="P32">Avec un seuil déjà connu :</text:p>
      <text:p text:style-name="P16"><text:span text:style-name="T16">S(n,</text:span><text:span text:style-name="T22">θ</text:span><text:span text:style-name="T23">i</text:span><text:span text:style-name="T16">) = </text:span><text:span text:style-name="T20">c – </text:span><text:span text:style-name="T22">ø</text:span><text:span text:style-name="T20">(n) + </text:span><text:span text:style-name="T22">θ</text:span><text:span text:style-name="T23">i</text:span><text:span text:style-name="T20">tanh(n/T)</text:span></text:p>
      <text:p text:style-name="P16"><text:span text:style-name="T20"/></text:p>
      <text:p text:style-name="P22"><text:span text:style-name="T51">D</text:span><text:span text:style-name="T52">ans la partie précédente nous avons démontré que :</text:span></text:p>
      <text:p text:style-name="P22"><text:span text:style-name="T52"/></text:p>
      <text:p text:style-name="P2"><text:span text:style-name="T35">∂S/∂n = </text:span><text:span text:style-name="T16">−</text:span><text:span text:style-name="T35">(γ/(</text:span><text:span text:style-name="T16">1+n</text:span><text:span text:style-name="T35">))</text:span><text:span text:style-name="T16">+</text:span><text:span text:style-name="T35">(</text:span><text:span text:style-name="T16">θi/</text:span><text:span text:style-name="T35">T)</text:span><text:span text:style-name="T16">(1−tanh</text:span><text:span text:style-name="T35">²</text:span><text:span text:style-name="T16">(n/T)) </text:span></text:p>
      <text:p text:style-name="P33">a. Preuve</text:p>
      <text:p text:style-name="P33">On dérive l’expression P(n) :</text:p>
      <text:p text:style-name="P2"><text:span text:style-name="T35">∂</text:span><text:span text:style-name="T16">P/</text:span><text:span text:style-name="T35">∂</text:span><text:span text:style-name="T16">n = − E[ f</text:span><text:span text:style-name="T53">V</text:span><text:span text:style-name="T16">(S(n,θ</text:span><text:span text:style-name="T53">i</text:span><text:span text:style-name="T16">)) · </text:span><text:span text:style-name="T35">∂</text:span><text:span text:style-name="T16">S/</text:span><text:span text:style-name="T35">∂</text:span><text:span text:style-name="T16">n ]</text:span></text:p>
      <text:p text:style-name="P2">Le signe de <text:span text:style-name="T35">∂</text:span>P/<text:span text:style-name="T35">∂</text:span>n est donc l’opposé du signe moyen de <text:span text:style-name="T35">∂</text:span>S/<text:span text:style-name="T35">∂</text:span>n.</text:p>
      <text:p text:style-name="P2">Ainsi :</text:p>
      <text:list text:style-name="L3">
        <text:list-item>
          <text:p text:style-name="P34">Si <text:span text:style-name="T35">∂</text:span><text:span text:style-name="T54">S/</text:span><text:span text:style-name="T35">∂</text:span>n &lt; 0 en moyenne → P(n) augmente</text:p>
        </text:list-item>
        <text:list-item>
          <text:p text:style-name="P34"><text:span text:style-name="T16">Si </text:span><text:span text:style-name="T35">∂</text:span><text:span text:style-name="T16">S/</text:span><text:span text:style-name="T35">∂</text:span><text:span text:style-name="T16">n &gt; 0 en moyenne → P(n) diminue</text:span></text:p>
        </text:list-item>
      </text:list>
      <text:p text:style-name="P35">b. Condition de retournement</text:p>
      <text:p text:style-name="P2"><text:span text:style-name="T55">Ici nous montrons le moment où </text:span>P(n) commence à diminuer :</text:p>
      <text:p text:style-name="P2"><text:span text:style-name="T16">E[ (θ</text:span><text:span text:style-name="T53">i</text:span><text:span text:style-name="T16"> / T) · (1 − tanh²(n/T)) ] &gt; γ/(1+n)</text:span></text:p>
      <text:p text:style-name="P2"><text:span text:style-name="T16"/></text:p>
      <text:p text:style-name="P33">c.Discussion</text:p>
      <text:p text:style-name="P31">Après avoir étudié le seuil de chaque agent et déduis que celui-ci est composé de deux parties, la partie matériel qui est la même pour tous et la partie psychologique qui est propre à chacun en fonction de sa réactance et de sa confiance dans les institutions, nous proposons une analyse de la probabilité d’adoption sur l’ensemble des agents.</text:p>
      <text:p text:style-name="P22"><text:span text:style-name="T20">L</text:span><text:span text:style-name="T52">orsque le seuil augmente, il est plus difficile d’adopter la politique publique et, par conséquent, P(n) diminue.</text:span></text:p>
      <text:p text:style-name="P2"><text:span text:style-name="T52"/></text:p>
      <text:p text:style-name="P2"><text:span text:style-name="T56">Pour l’effet matériel (qui est pro-adoption) défini par </text:span>) − γ/(1+n), <text:span text:style-name="T56">il a été établi qu’il</text:span> réduit le seuil <text:span text:style-name="T56">et donc</text:span> favorise l’adoption. <text:span text:style-name="T56">Par contre, cet effet</text:span> décroît avec n.</text:p>
      <text:p text:style-name="P2"><text:span text:style-name="T56">A l’inverse, l’e</text:span>ffet psychologique (anti-adoption) <text:span text:style-name="T56">défini par </text:span><text:span text:style-name="T35">(</text:span><text:span text:style-name="T52">θi/</text:span><text:span text:style-name="T35">T)</text:span><text:span text:style-name="T52">(1−tanh</text:span><text:span text:style-name="T35">²</text:span><text:span text:style-name="T52">(n/T)) </text:span>augmente le seuil. <text:span text:style-name="T56">Cet effet </text:span>dépend du type d’agent <text:span text:style-name="T56">et de sa nature à réagir aux politiques publiques de manière négative mais aussi de sa confiance en l’état ou l’organisme qui déploie l’action. Cet effet est </text:span>borné mais significatif.</text:p>
      <text:p text:style-name="P2"/>
      <text:p text:style-name="P35"><text:span text:style-name="T57">d</text:span>. Lecture économique</text:p>
      <text:p text:style-name="P35"><text:soft-page-break/>Comment interpréter économiquement l’évolution du modèle et son impact sur la part de la population qui adopte l’action ou le comportement visé par le nudge.</text:p>
      <text:p text:style-name="P2">Au départ, <text:span text:style-name="T55">nous avons un </text:span>n faible, <text:span text:style-name="T55">c’est à dire une effet faible de la politique publique ou nudge sur la population. Par conséquent c’est </text:span><text:span text:style-name="T22">ø</text:span><text:span text:style-name="T20">(n) </text:span><text:span text:style-name="T54">qui domine et le seuil baisse pour les agents. Avec ces conditions, nous avons une part d’adoption (P(n)) qui augmente.</text:span></text:p>
      <text:p text:style-name="P2"><text:span text:style-name="T55">Ensuite, p</text:span>our n plus élevé, <text:span text:style-name="T55">autrement dit, une politique publique ou un nudge plus présent et qui se veut plus fort sur la population c’est </text:span>tanh(n/T) <text:span text:style-name="T55">qui</text:span> devient important, <text:span text:style-name="T55">c’est à dire la fonction de confiance dans les institutions. L</text:span>es agents à forte <text:span text:style-name="T55">réactance (</text:span>θ<text:span text:style-name="T26">i</text:span><text:span text:style-name="T55">)</text:span> sont découragés, <text:span text:style-name="T55">nous observons un </text:span>effet de sélection <text:span text:style-name="T55">dans la population qui se scinde en deux groupes : ceux qui adoptent l’action et ceux qui sont contre. Cette évolution est progressive et non brutale, les agents passant un à un du groupe des adoptants à celui des réactants.</text:span></text:p>
      <text:p text:style-name="P2"><text:span text:style-name="T55">Dans le cas où</text:span> la sensibilité moyenne à l’autonomie est suffisamment forte <text:span text:style-name="T55">la part d’adoptants (</text:span>P(n)<text:span text:style-name="T55">)</text:span> peut atteindre un maximum puis diminuer <text:span text:style-name="T55">petit à petit.</text:span></text:p>
      <text:p text:style-name="P2">La non-monotonie de P(n) n’est pas automatique <text:span text:style-name="T55">et </text:span>dépend <text:span text:style-name="T55">de l’efficacité matérielle du nudge (</text:span>γ), <text:span text:style-name="T55">de la confiance institutionnelle (</text:span>T), de la distribution de <text:span text:style-name="T55">la réactance dans la population (</text:span>θ<text:span text:style-name="T26">i</text:span>) <text:span text:style-name="T55">et de </text:span>l’hétérogénéité des motivations <text:span text:style-name="T55">(</text:span>V<text:span text:style-name="T26">i</text:span><text:span text:style-name="T55">).</text:span></text:p>
      <text:p text:style-name="P2"><text:span text:style-name="T55">Notre</text:span> modèle montre que l’inefficacité potentielle d’un nudge est une propriété structurelle liée à l’hétérogénéité comportementale.</text:p>
      <text:p text:style-name="P16"><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7T20:24:17.558000000</meta:creation-date>
    <meta:generator>LibreOffice/24.8.0.3$Windows_X86_64 LibreOffice_project/0bdf1299c94fe897b119f97f3c613e9dca6be583</meta:generator>
    <dc:date>2026-05-27T20:24:55.355000000</dc:date>
    <meta:editing-duration>PT37S</meta:editing-duration>
    <meta:editing-cycles>1</meta:editing-cycles>
    <meta:document-statistic meta:table-count="0" meta:image-count="0" meta:object-count="0" meta:page-count="7" meta:paragraph-count="88" meta:word-count="2118" meta:character-count="13323" meta:non-whitespace-character-count="11243"/>
  </office:meta>
</office:document-meta>
</file>