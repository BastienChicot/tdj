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fo:font-size="16pt" officeooo:paragraph-rsid="00246826" style:font-size-asian="16pt" style:font-size-complex="16pt"/>
    </style:style>
    <style:style style:name="P2" style:family="paragraph" style:parent-style-name="Heading_20_2">
      <style:text-properties officeooo:rsid="0023f93d" officeooo:paragraph-rsid="0023f93d"/>
    </style:style>
    <style:style style:name="P3" style:family="paragraph" style:parent-style-name="Text_20_body">
      <style:text-properties officeooo:paragraph-rsid="0035da7d"/>
    </style:style>
    <style:style style:name="P4" style:family="paragraph" style:parent-style-name="Text_20_body">
      <style:text-properties officeooo:rsid="0025e140" officeooo:paragraph-rsid="0025e140"/>
    </style:style>
    <style:style style:name="P5" style:family="paragraph" style:parent-style-name="Text_20_body">
      <style:text-properties officeooo:paragraph-rsid="0025e140"/>
    </style:style>
    <style:style style:name="P6" style:family="paragraph" style:parent-style-name="Text_20_body">
      <style:text-properties officeooo:paragraph-rsid="0026c8f8"/>
    </style:style>
    <style:style style:name="P7" style:family="paragraph" style:parent-style-name="Heading_20_2">
      <style:text-properties officeooo:rsid="0026c8f8" officeooo:paragraph-rsid="0026c8f8"/>
    </style:style>
    <style:style style:name="P8" style:family="paragraph" style:parent-style-name="Text_20_body">
      <style:text-properties officeooo:paragraph-rsid="0021e42b"/>
    </style:style>
    <style:style style:name="P9" style:family="paragraph" style:parent-style-name="Text_20_body">
      <style:text-properties officeooo:rsid="001b2136" officeooo:paragraph-rsid="00287d8f"/>
    </style:style>
    <style:style style:name="P10" style:family="paragraph" style:parent-style-name="Text_20_body">
      <style:text-properties officeooo:paragraph-rsid="00287d8f"/>
    </style:style>
    <style:style style:name="P11" style:family="paragraph" style:parent-style-name="Standard">
      <style:text-properties officeooo:rsid="0035a0fb" officeooo:paragraph-rsid="00232877"/>
    </style:style>
    <style:style style:name="P12" style:family="paragraph" style:parent-style-name="Standard">
      <style:text-properties officeooo:rsid="0030f353" officeooo:paragraph-rsid="00232877"/>
    </style:style>
    <style:style style:name="P13" style:family="paragraph" style:parent-style-name="Standard">
      <style:paragraph-properties fo:text-align="center" style:justify-single-word="false"/>
      <style:text-properties fo:font-size="16pt" fo:font-weight="bold" officeooo:rsid="00208b46" officeooo:paragraph-rsid="00232877" style:font-size-asian="16pt" style:font-weight-asian="bold" style:font-size-complex="16pt" style:font-weight-complex="bold"/>
    </style:style>
    <style:style style:name="P14" style:family="paragraph" style:parent-style-name="Standard">
      <style:text-properties officeooo:rsid="001e6797" officeooo:paragraph-rsid="00232877"/>
    </style:style>
    <style:style style:name="P15" style:family="paragraph" style:parent-style-name="Standard" style:list-style-name="L1">
      <style:text-properties officeooo:rsid="00252e95" officeooo:paragraph-rsid="00232877"/>
    </style:style>
    <style:style style:name="P16" style:family="paragraph" style:parent-style-name="Standard" style:list-style-name="L1">
      <style:text-properties officeooo:paragraph-rsid="00232877"/>
    </style:style>
    <style:style style:name="P17" style:family="paragraph" style:parent-style-name="Text_20_body" style:list-style-name="L1">
      <style:paragraph-properties fo:margin-top="0cm" fo:margin-bottom="0cm" style:contextual-spacing="false"/>
      <style:text-properties officeooo:paragraph-rsid="00232877"/>
    </style:style>
    <style:style style:name="P18" style:family="paragraph" style:parent-style-name="Standard" style:list-style-name="L1">
      <style:text-properties officeooo:rsid="001e6797" officeooo:paragraph-rsid="00232877"/>
    </style:style>
    <style:style style:name="P19" style:family="paragraph" style:parent-style-name="Standard" style:list-style-name="L1">
      <style:text-properties style:text-position="0% 100%" officeooo:rsid="00252e95" officeooo:paragraph-rsid="00232877"/>
    </style:style>
    <style:style style:name="P20" style:family="paragraph" style:parent-style-name="Standard">
      <style:text-properties style:text-position="0% 100%" officeooo:rsid="00252e95" officeooo:paragraph-rsid="00232877"/>
    </style:style>
    <style:style style:name="P21" style:family="paragraph" style:parent-style-name="Standard">
      <style:text-properties style:text-position="0% 100%" officeooo:rsid="002caae7" officeooo:paragraph-rsid="002caae7"/>
    </style:style>
    <style:style style:name="P22" style:family="paragraph" style:parent-style-name="Text_20_body">
      <style:text-properties officeooo:rsid="002caae7" officeooo:paragraph-rsid="002caae7"/>
    </style:style>
    <style:style style:name="P23" style:family="paragraph" style:parent-style-name="Text_20_body">
      <style:text-properties officeooo:rsid="002d2cb3" officeooo:paragraph-rsid="002d2cb3"/>
    </style:style>
    <style:style style:name="P24" style:family="paragraph" style:parent-style-name="Heading_20_3">
      <style:text-properties officeooo:paragraph-rsid="002caae7"/>
    </style:style>
    <style:style style:name="P25" style:family="paragraph" style:parent-style-name="Text_20_body">
      <style:text-properties officeooo:rsid="002da47c" officeooo:paragraph-rsid="002da47c"/>
    </style:style>
    <style:style style:name="P26" style:family="paragraph" style:parent-style-name="Text_20_body">
      <style:text-properties officeooo:rsid="002eba8a" officeooo:paragraph-rsid="002eba8a"/>
    </style:style>
    <style:style style:name="T1" style:family="text">
      <style:text-properties officeooo:rsid="0023f93d"/>
    </style:style>
    <style:style style:name="T2" style:family="text">
      <style:text-properties officeooo:rsid="001f2961"/>
    </style:style>
    <style:style style:name="T3" style:family="text">
      <style:text-properties officeooo:rsid="002af740"/>
    </style:style>
    <style:style style:name="T4" style:family="text">
      <style:text-properties officeooo:rsid="00180270"/>
    </style:style>
    <style:style style:name="T5" style:family="text">
      <style:text-properties officeooo:rsid="0025e140"/>
    </style:style>
    <style:style style:name="T6" style:family="text">
      <style:text-properties officeooo:rsid="0023fd50"/>
    </style:style>
    <style:style style:name="T7" style:family="text">
      <style:text-properties officeooo:rsid="001e05c8"/>
    </style:style>
    <style:style style:name="T8" style:family="text">
      <style:text-properties officeooo:rsid="0026c8f8"/>
    </style:style>
    <style:style style:name="T9" style:family="text">
      <style:text-properties officeooo:rsid="003cdd74"/>
    </style:style>
    <style:style style:name="T10" style:family="text">
      <style:text-properties style:text-position="super 58%"/>
    </style:style>
    <style:style style:name="T11" style:family="text">
      <style:text-properties officeooo:rsid="002ffc89"/>
    </style:style>
    <style:style style:name="T12" style:family="text">
      <style:text-properties officeooo:rsid="003ce833"/>
    </style:style>
    <style:style style:name="T13" style:family="text">
      <style:text-properties officeooo:rsid="00287d8f"/>
    </style:style>
    <style:style style:name="T14" style:family="text">
      <style:text-properties officeooo:rsid="0019f9e5"/>
    </style:style>
    <style:style style:name="T15" style:family="text">
      <style:text-properties officeooo:rsid="002b6a9e"/>
    </style:style>
    <style:style style:name="T16" style:family="text">
      <style:text-properties fo:font-weight="normal" officeooo:rsid="0019f9e5" style:font-weight-asian="normal" style:font-weight-complex="normal"/>
    </style:style>
    <style:style style:name="T17" style:family="text">
      <style:text-properties fo:font-weight="normal" officeooo:rsid="0026c8f8" style:font-weight-asian="normal" style:font-weight-complex="normal"/>
    </style:style>
    <style:style style:name="T18" style:family="text">
      <style:text-properties fo:font-weight="normal" officeooo:rsid="00346755" style:font-weight-asian="normal" style:font-weight-complex="normal"/>
    </style:style>
    <style:style style:name="T19" style:family="text">
      <style:text-properties fo:font-weight="normal" officeooo:rsid="00287d8f" style:font-weight-asian="normal" style:font-weight-complex="normal"/>
    </style:style>
    <style:style style:name="T20" style:family="text">
      <style:text-properties officeooo:rsid="001b12c0"/>
    </style:style>
    <style:style style:name="T21" style:family="text">
      <style:text-properties officeooo:rsid="00299f29"/>
    </style:style>
    <style:style style:name="T22" style:family="text">
      <style:text-properties fo:font-weight="normal" style:font-weight-asian="normal" style:font-weight-complex="normal"/>
    </style:style>
    <style:style style:name="T23" style:family="text">
      <style:text-properties officeooo:rsid="001b2136"/>
    </style:style>
    <style:style style:name="T24" style:family="text">
      <style:text-properties officeooo:rsid="00299b73"/>
    </style:style>
    <style:style style:name="T25" style:family="text">
      <style:text-properties officeooo:rsid="002c5bde"/>
    </style:style>
    <style:style style:name="T26" style:family="text">
      <style:text-properties officeooo:rsid="002feebb"/>
    </style:style>
    <style:style style:name="T27" style:family="text">
      <style:text-properties officeooo:rsid="003bbb28"/>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38883d" style:font-style-asian="normal" style:font-style-complex="normal"/>
    </style:style>
    <style:style style:name="T31" style:family="text">
      <style:text-properties fo:font-style="normal" officeooo:rsid="0039f04e" style:font-style-asian="normal" style:font-style-complex="normal"/>
    </style:style>
    <style:style style:name="T32" style:family="text">
      <style:text-properties fo:font-style="normal" officeooo:rsid="003c23c5" style:font-style-asian="normal" style:font-style-complex="normal"/>
    </style:style>
    <style:style style:name="T33" style:family="text">
      <style:text-properties fo:font-style="normal" officeooo:rsid="0030dd42" style:font-style-asian="normal" style:font-style-complex="normal"/>
    </style:style>
    <style:style style:name="T34" style:family="text">
      <style:text-properties style:text-position="sub 58%" fo:font-style="normal" officeooo:rsid="0030dd42" style:font-style-asian="normal" style:font-style-complex="normal"/>
    </style:style>
    <style:style style:name="T35" style:family="text">
      <style:text-properties fo:font-style="normal" officeooo:rsid="001e6797" style:font-style-asian="normal" style:font-style-complex="normal"/>
    </style:style>
    <style:style style:name="T36" style:family="text">
      <style:text-properties style:text-position="sub 58%" fo:font-style="normal" officeooo:rsid="001e6797" style:font-style-asian="normal" style:font-style-complex="normal"/>
    </style:style>
    <style:style style:name="T37" style:family="text">
      <style:text-properties fo:font-style="normal" officeooo:rsid="003dbb84" style:font-style-asian="normal" style:font-style-complex="normal"/>
    </style:style>
    <style:style style:name="T38" style:family="text">
      <style:text-properties style:text-position="sub 58%" fo:font-style="normal" officeooo:rsid="003dbb84" style:font-style-asian="normal" style:font-style-complex="normal"/>
    </style:style>
    <style:style style:name="T39" style:family="text">
      <style:text-properties style:text-position="sub 58%"/>
    </style:style>
    <style:style style:name="T40" style:family="text">
      <style:text-properties officeooo:rsid="001e6797"/>
    </style:style>
    <style:style style:name="T41" style:family="text">
      <style:text-properties style:text-position="sub 58%" officeooo:rsid="001e6797"/>
    </style:style>
    <style:style style:name="T42" style:family="text">
      <style:text-properties officeooo:rsid="0020e11f"/>
    </style:style>
    <style:style style:name="T43" style:family="text">
      <style:text-properties officeooo:rsid="0035a0fb"/>
    </style:style>
    <style:style style:name="T44" style:family="text">
      <style:text-properties officeooo:rsid="00252e95"/>
    </style:style>
    <style:style style:name="T45" style:family="text">
      <style:text-properties officeooo:rsid="001eba98"/>
    </style:style>
    <style:style style:name="T46" style:family="text">
      <style:text-properties style:text-position="0% 100%" officeooo:rsid="0035a0fb"/>
    </style:style>
    <style:style style:name="T47" style:family="text">
      <style:text-properties style:text-position="0% 100%" officeooo:rsid="00252e95"/>
    </style:style>
    <style:style style:name="T48" style:family="text">
      <style:text-properties officeooo:rsid="003f0915"/>
    </style:style>
    <style:style style:name="T49" style:family="text">
      <style:text-properties officeooo:rsid="0030eba5"/>
    </style:style>
    <style:style style:name="T50" style:family="text">
      <style:text-properties officeooo:rsid="0038d424"/>
    </style:style>
    <style:style style:name="T51" style:family="text">
      <style:text-properties officeooo:rsid="002da47c"/>
    </style:style>
    <style:style style:name="T52" style:family="text">
      <style:text-properties officeooo:rsid="002eba8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p text:style-name="P1">Réactance psychologique et limites structurelles des <text:span text:style-name="T1">politiques publiques</text:span> </text:p>
      <text:h text:style-name="P2" text:outline-level="2">Contexte</text:h>
      <text:p text:style-name="P3"><text:span text:style-name="T2">Les politiques publiques mobilisent depuis longtemps un large éventail d’instruments visant à orienter les comportements individuels dans un sens jugé socialement désirable. </text:span><text:span text:style-name="T3">U</text:span><text:span text:style-name="T4">ne grande majorité </text:span><text:span text:style-name="T3">de celles-ci sont</text:span><text:span text:style-name="T2"> fondées sur des règles contraignantes assorties de sanctions ou d’incitations financières explicites. </text:span><text:span text:style-name="T5">I</text:span><text:span text:style-name="T4">l existe </text:span><text:span text:style-name="T6">aussi</text:span><text:span text:style-name="T4"> des </text:span><text:span text:style-name="T7">approches mettant en œuvre des </text:span><text:span text:style-name="T4">mécanismes </text:span><text:span text:style-name="T7">issus</text:span><text:span text:style-name="T4"> </text:span><text:span text:style-name="T7">de</text:span><text:span text:style-name="T4"> la recherche en sciences comportementales qui s’appuient sur les biais cognitifs des agents pour les guider sans les contraindre vers une action : les Nudges ou paternalisme libertarien. </text:span></text:p>
      <text:p text:style-name="P4">Toutefois, quelle que soit la solution envisagée, il apparaît toujours qu’une partie de la population ne suit pas les politiques qui leur sont suggérées ou imposées, peu importe si celles-ci visent à augmenter le bien-être global ou même la qualité de vie de chaque individu. <text:span text:style-name="T8">Chaque personne a ses propres raisons de ne pas suivre des recommandations. </text:span><text:span text:style-name="T9">Celles-ci</text:span><text:span text:style-name="T8"> peuvent être regroupées dans une seule notion qui s’appelle la « réactance » et qui a été introduite par Brehm en 1966.</text:span> Plusieurs exemples peuvent être pris pour illustrer ce<text:span text:style-name="T9">la</text:span> :</text:p>
      <text:p text:style-name="P4">- Depuis le 1<text:span text:style-name="T10">er</text:span> janvier 2017, chaque français est considéré par défaut comme donneur d’organes. Cependant, une frange de l’ordre de 20 % de la population fait encore la démarche de se déclarer non-donneur que ce soit pour des raisons personnelles, des croyances ou des convictions.</text:p>
      <text:p text:style-name="P4">- <text:span text:style-name="T11">En 2012, en France, une loi a imposé aux conducteurs de voiture de disposer d’un éthylotest dans leur </text:span><text:span text:style-name="T12">véhicule</text:span><text:span text:style-name="T11">. </text:span><text:span text:style-name="T12">D</text:span><text:span text:style-name="T11">es services comme les assurances ou certaines campagnes </text:span><text:span text:style-name="T12">mises en place, en ont </text:span><text:span text:style-name="T11">offert un peu partout. </text:span><text:span text:style-name="T12">Toutefois,</text:span><text:span text:style-name="T11"> très peu de personnes ont réalisé la démarche de s’en procurer par eux-même. Les forces de l’ordre </text:span><text:span text:style-name="T12">ont </text:span><text:span text:style-name="T11">très peu mobilisées pour recouvrer les manquement à cette règle. Cette loi a fini par être abandonnée courant 2020 face à son échec causé d’une part par le manque de contrôle mais aussi et surtout par la non-adoption et son non-respect par une trop grande part de la population.</text:span></text:p>
      <text:p text:style-name="P5"><text:span text:style-name="T5">- </text:span>La crise du COVID-19 a également mis en évidence l’existence d’une hétérogénéité importante dans l’acceptation des politiques vaccinales. </text:p>
      <text:p text:style-name="P4">- Les dépistages organisés (cancer colorectal, sein, HPV…) sont gratuits et de plus en plus simple à réalise<text:span text:style-name="T8">r</text:span> pour le patient. <text:span text:style-name="T8">Il </text:span>ne parviennent pas non plus à rassembler l’ensemble de la population. Il en va de même pour les recommandations alimentaires. Plusieurs mécanismes incitatifs sont là pour aider à mieux consommer. Pourtant, bien que ces mesures aient été mis en place pour améliorer la qualité de vie des <text:span text:style-name="T11">usagers</text:span>, elles ne font pas l’unanimité.</text:p>
      <text:p text:style-name="P4">- Il est de plus en plus simple d’utiliser la télémédecine sur les territoires. Le déploiement d’internet, la réduction des zones blanches et l’amélioration des services ne suffisent pas encore à garantir une adoption <text:span text:style-name="T11">totale</text:span> de ces outils. </text:p>
      <text:p text:style-name="P6">Il apparaît difficile d’observer une adhésion complète et homogène à une politique publique au sein d’une population.<text:span text:style-name="T8"> Par conséquent, la question qui se pose n’est pas de savoir comment réussir à </text:span><text:soft-page-break/><text:span text:style-name="T8">inciter tout le monde mais plutôt : </text:span>Comment calibrer une politique publique afin de maximiser l’adoption sans déclencher excessivement la réactance ? </text:p>
      <text:h text:style-name="P7" text:outline-level="2"><text:span text:style-name="T13">L</text:span>a littérature</text:h>
      <text:p text:style-name="P8">De nombreux travaux empiriques ont montré que <text:span text:style-name="T8">l</text:span>es dispositifs <text:span text:style-name="T8">incitatifs comme les nudges</text:span> pouvaient, dans certains contextes, améliorer significativement les taux d’adoption de comportements jugés souhaitables. Toutefois, <text:span text:style-name="T14"><text:s/>nous avons </text:span><text:span text:style-name="T15">aujourd’hui </text:span><text:span text:style-name="T14">suffisamment de recul pour remettre en question l’efficacité de ces mécanismes.</text:span> <text:span text:style-name="T15">U</text:span>n constat récurrent s’impose : les effets des nudges apparaissent souvent hétérogènes, limités dans le temps, voire contre-productifs pour une partie de la population. Dans plusieurs cas, l’introduction d’un nudge s’accompagne d’un phénomène de rejet ou de résistance active, y compris lorsque l’action recommandée est peu coûteuse individuellement et bénéfique collectivement.</text:p>
      <text:p text:style-name="P8"><text:span text:style-name="Strong_20_Emphasis"><text:span text:style-name="T16">De nombreux travaux ont, par ailleurs, tentés de modéliser et de comprendre tout ou partie des biais qui viennent perturber le bon fonctionnement des </text:span></text:span><text:span text:style-name="Strong_20_Emphasis"><text:span text:style-name="T17">politiques publiques</text:span></text:span><text:span text:style-name="Strong_20_Emphasis"><text:span text:style-name="T16">. Par exemple, nous </text:span></text:span><text:span text:style-name="Strong_20_Emphasis"><text:span text:style-name="T18">supposons</text:span></text:span><text:span text:style-name="Strong_20_Emphasis"><text:span text:style-name="T16"> que les individus ne maximisent pas uniquement une utilité matérielle, mais cherchent également à agir en cohérence avec une image de soi ou une appartenance sociale donnée (Akerlof et Kranton). Dans cette perspective, suivre une recommandation externe peut être perçu comme incompatible avec certaines identités, réduisant ainsi l’attrait de l’action proposée. D’autres contributions soulignent le rôle des incitations et de la réputation dans les comportements prosociaux : une intervention externe peut modifier la signification morale d’une action et en réduire la motivation intrinsèque, phénomène souvent qualifié de </text:span></text:span><text:span text:style-name="Emphasis"><text:span text:style-name="T16">crowding-out</text:span></text:span><text:span text:style-name="Strong_20_Emphasis"><text:span text:style-name="T16"> (Bénabou et Tirole). Enfin, des travaux expérimentaux mettent en évidence qu’un</text:span></text:span><text:span text:style-name="Strong_20_Emphasis"><text:span text:style-name="T19">e simple incitation </text:span></text:span><text:span text:style-name="Strong_20_Emphasis"><text:span text:style-name="T16">peut être interprété</text:span></text:span><text:span text:style-name="Strong_20_Emphasis"><text:span text:style-name="T19">e</text:span></text:span><text:span text:style-name="Strong_20_Emphasis"><text:span text:style-name="T16"> négativement par un agent pour qui la liberté de choix est importante. Toute forme de contrôle représente un coût supplémentaire qui vient contrebalancer les bénéfices retirés d’un acte ou d’une décision (Falk et Kosfeld).</text:span></text:span></text:p>
      <text:p text:style-name="P8"><text:span text:style-name="T15">Plus récemment,</text:span><text:span text:style-name="T20"> Lowenstein et Chater font état de l’approche individualiste de certaines politiques publiques comme les Nudges. Ils présentent ce type d’outils comme des mécanismes qui responsabilisent trop les agents sans pour autant, leur expliquer en quoi leur décision à un impact à une échelle plus grande. C’est la différence entre ce qu’ils appellent le i-frame (pour individuel, qui culpabilise plus l’agent qu’autre chose) et le s-frame (pour syst</text:span><text:span text:style-name="T21">è</text:span><text:span text:style-name="T20">m</text:span><text:span text:style-name="T21">e</text:span><text:span text:style-name="T20">, qui donne les raisons du besoin de changement systémique </text:span><text:span text:style-name="T2">et qui impacte la société dans son ensemble et plus seulement les agents un à un</text:span><text:span text:style-name="T20">).</text:span> L’ensemble de ces travaux converge vers une idée commune : <text:span text:style-name="Strong_20_Emphasis"><text:span text:style-name="T22">les interventions comportementales peuvent générer des coûts psychologiques endogènes, induits par l’intervention elle-même</text:span></text:span><text:span text:style-name="T22">,</text:span> et non uniquement par l’action recommandée.</text:p>
      <text:p text:style-name="P8"><text:span text:style-name="T20">Tous ces freins au bon fonctionnement des politiques publiques peuvent être intégrer à la notion de réactance </text:span><text:span text:style-name="T2">introduite</text:span><text:span text:style-name="T20"> par Brehm en 1966 et qui représente les motivations pour lesquelles des agents pourraient être amenés à ne pas se conformer à certaines actions. Cette notion de réactance nous permet </text:span><text:span text:style-name="T15">d’affirmer</text:span><text:span text:style-name="T20"> que ces agents </text:span>restent rationnels au sens de la maximisation d’une utilité élargie<text:span text:style-name="T20">. </text:span><text:span text:style-name="T15">C</text:span><text:span text:style-name="T2">es coûts apparaissent comme rationnels si nous considérons que chaque agent d’une population avec des préférences hétérogènes, cherche à maximiser son utilité en prenant en compte tous les éléments exogènes.</text:span></text:p>
      <text:p text:style-name="P8"><text:span text:style-name="T23">Tous ces travaux ont permis de mettre en lumière différents problèmes pouvant affecter les politiques publiques. </text:span>À notre connaissance, il n’existe pas de cadre formel unifié permettant <text:soft-page-break/>d’analyser conjointement identité, contrôle perçu et réactance dans l’évaluation de l’efficacité des <text:span text:style-name="T13">politiques publiques</text:span>.<text:span text:style-name="T23"> </text:span><text:span text:style-name="T2">Il nous paraît pertinent de joindre l’aspect psychologique qui altèrent les coûts liés à une décision dans une population et l’aspect économique sur la pertinence et la réussite d’une </text:span><text:span text:style-name="T13">telle politique</text:span><text:span text:style-name="T2">.</text:span></text:p>
      <text:h text:style-name="Heading_20_2" text:outline-level="2">Contribution</text:h>
      <text:p text:style-name="P9">Dans ce <text:span text:style-name="T24">projet</text:span>, nous <text:span text:style-name="T15">proposons un</text:span> mod<text:span text:style-name="T15">è</text:span>l<text:span text:style-name="T15">e</text:span> <text:span text:style-name="T15">formel autour d</text:span>es décisions des agents <text:span text:style-name="T15">en </text:span>intégrant la réactance comme fonction liée à l’autonomie et à la confiance institutionnelle. Les agents sont hétérogènes dans leur sensibilité <text:span text:style-name="T25">aux</text:span> coût<text:span text:style-name="T25">s liés à une politique publique</text:span>, lequel dépend notamment de l’intensité de l’intervention et de facteurs institutionnels tels que la confiance. </text:p>
      <text:p text:style-name="P10"><text:span text:style-name="T23">A travers ce modèle, nous </text:span><text:span text:style-name="T25">montrons</text:span><text:span text:style-name="T23"> comment réagit un groupe en fonction de la force de la réactance et des éléments qui l’a compose, ainsi, nous </text:span><text:span text:style-name="T25">observons</text:span><text:span text:style-name="T23"> l’application et les probabilités de réussite d’une politique publique. Nous </text:span><text:span text:style-name="T25">mobilisons ensuite le modèle dans un cadre de la théorie des jeux afin d’</text:span><text:span text:style-name="T26">analyser</text:span><text:span text:style-name="T25"> </text:span>l’interaction entre une autorité publique et une population d’agents hétérogènes. </text:p>
      <text:p text:style-name="P10">Ces résultats apportent des implications importantes pour la conception des politiques publiques et invitent à repenser le rôle et les limites des <text:span text:style-name="T24">politiques publiques</text:span> dans des contextes caractérisés par une forte hétérogénéité des préférences et des perceptions.</text:p>
      <text:p text:style-name="P10">Le projet propose un cadre théorique unifié permettant de modéliser simultanément les effets matériels et psychologiques des politiques publiques comportementales. </text:p>
      <text:h text:style-name="Heading_20_2" text:outline-level="2">Modèle </text:h>
      <text:p text:style-name="P11"><text:span text:style-name="T27">N</text:span>ous posons un jeu dans lequel un agent <text:span text:style-name="T28">i</text:span> a le choix d’effectuer une action <text:span text:style-name="T28">s</text:span><text:span text:style-name="T29">. Cette action est mise en place par une institution publique qui </text:span><text:span text:style-name="T30">utilise</text:span><text:span text:style-name="T29"> une </text:span><text:span text:style-name="T31">intervention</text:span><text:span text:style-name="T29"> pour inciter les agents à effectuer cette action (a = 1 </text:span><text:span text:style-name="T32">sachant que </text:span><text:span text:style-name="T33">a</text:span><text:span text:style-name="T34">i</text:span><text:span text:style-name="T33"> = 1 </text:span><text:span text:style-name="T29">si et seulement si</text:span><text:span text:style-name="T33"> V</text:span><text:span text:style-name="T34">i</text:span><text:span text:style-name="T33"> ≥ c – </text:span><text:span text:style-name="T35">ø</text:span><text:span text:style-name="T33">(n) + </text:span><text:span text:style-name="T35">θ</text:span><text:span text:style-name="T36">i</text:span><text:span text:style-name="T33">tanh(n/T) </text:span><text:span text:style-name="T37">ou U</text:span><text:span text:style-name="T38">i</text:span><text:span text:style-name="T37">(1) ≥ 0</text:span><text:span text:style-name="T32">)</text:span><text:span text:style-name="T29">.</text:span></text:p>
      <text:p text:style-name="P11"><text:span text:style-name="T29">Pour chaque agent </text:span><text:span text:style-name="T28">i</text:span><text:span text:style-name="T29">, nous définissons une fonction d’utilité</text:span><text:span text:style-name="T28"> U </text:span><text:span text:style-name="T29">telle que :</text:span></text:p>
      <text:p text:style-name="P12"/>
      <text:p text:style-name="P13">U<text:span text:style-name="T39">i</text:span>(a) = a * [ V<text:span text:style-name="T39">i</text:span> – ( c – <text:span text:style-name="T40">ø(n)</text:span>) - <text:span text:style-name="T40">θ</text:span><text:span text:style-name="T41">i</text:span><text:span text:style-name="T40"> </text:span>* tanh(<text:span text:style-name="T42">n/T) ]</text:span></text:p>
      <text:p text:style-name="P13"/>
      <text:p text:style-name="P14"><text:span text:style-name="T43">où</text:span> : </text:p>
      <text:list text:style-name="L1">
        <text:list-item>
          <text:p text:style-name="P15">a <text:span text:style-name="T43">est un</text:span> paramètre binaire {0,1} </text:p>
        </text:list-item>
        <text:list-item>
          <text:p text:style-name="P15">V<text:span text:style-name="T39">i</text:span> <text:span text:style-name="T43">représente les</text:span> motivation<text:span text:style-name="T43">s </text:span>intrinsèque<text:span text:style-name="T43">s hétérogènes des agents via une d</text:span>istribution normale tronquée</text:p>
        </text:list-item>
        <text:list-item>
          <text:p text:style-name="P15">c <text:span text:style-name="T43">est le</text:span> coût de base fixe</text:p>
        </text:list-item>
        <text:list-item>
          <text:p text:style-name="P16"><text:span text:style-name="T40">ø(n) </text:span><text:span text:style-name="T43">est l’</text:span><text:span text:style-name="T44">efficacité du nudge tel</text:span><text:span text:style-name="T43">le</text:span><text:span text:style-name="T44"> que </text:span></text:p>
          <text:list>
            <text:list-item>
              <text:p text:style-name="P16"><text:span text:style-name="T40">ø(n) </text:span><text:span text:style-name="T45">= γ ln(1+n)</text:span><text:span text:style-name="T44"> </text:span></text:p>
            </text:list-item>
            <text:list-item>
              <text:p text:style-name="P16"><text:span text:style-name="T40">ø</text:span>(0)=0</text:p>
            </text:list-item>
            <text:list-item>
              <text:p text:style-name="P17"><text:span text:style-name="T40">ø</text:span>′(n)&gt;0 (efficacité croissante) </text:p>
            </text:list-item>
            <text:list-item>
              <text:p text:style-name="P17"><text:span text:style-name="T40">ø</text:span>′′(n)&lt;0 (rendements décroissants) </text:p>
            </text:list-item>
          </text:list>
        </text:list-item>
        <text:list-item>
          <text:p text:style-name="P18">θ<text:span text:style-name="T39">i </text:span><text:span text:style-name="T46">est la </text:span><text:span text:style-name="T47">sensibilité à la réactance </text:span><text:span text:style-name="T46">et suit une d</text:span><text:span text:style-name="T47">istribution Gamma </text:span></text:p>
        </text:list-item>
        <text:list-item>
          <text:p text:style-name="P19">tanh(n/T) <text:span text:style-name="T43">est le</text:span> signal de réactance. Fonction non linéaire.</text:p>
        </text:list-item>
        <text:list-item>
          <text:p text:style-name="P19">T <text:span text:style-name="T43">représente la</text:span> confiance institutionnelle </text:p>
        </text:list-item>
      </text:list>
      <text:p text:style-name="P20"/>
      <text:p text:style-name="P21">A partir de ce modèle, nous souhaitons travailler deux propositions majeures : </text:p>
      <text:p text:style-name="P21"><text:soft-page-break/>- L’étude du seuil de réactance de chaque agent i en fonction des différents paramètres et le<text:span text:style-name="T48">s</text:span> conditions pour atteindre l’adoption. Nous cherchons à étudier les effets d’une politique publique et à modéliser les effets matériels et psychologiques qui viennent contrebalancer la motivation intrinsèque <text:span text:style-name="T48">de l’</text:span>agent.</text:p>
      <text:p text:style-name="P21">- L’étude de l’adoption d’une politique publique dans une population hétérogène en travaillant sur l’agrégation des seuils des agents et leurs conditions d’adoption. A travers cela, nous souhaitons étudier comment chaque effets peut être contrôlés afin de maximiser l’adoption au sein d’un groupe.</text:p>
      <text:p text:style-name="P21"/>
      <text:h text:style-name="Heading_20_2" text:outline-level="2">Méthodologie</text:h>
      <text:p text:style-name="P22">Pour ce travail, nous envisageons 3 volets <text:span text:style-name="T48">principaux </text:span>:</text:p>
      <text:h text:style-name="Heading_20_3" text:outline-level="3">Théorique</text:h>
      <text:p text:style-name="P22">L’approche purement mathématique du modèle est la clé de la compréhension du phénomène de réactance. Cette étude repose sur le champs de la théorie des jeux, de l’économie comportementale et de la sociologie. </text:p>
      <text:p text:style-name="P23">Cette première phase <text:span text:style-name="T49">fait</text:span> l’objet d’un article théorique présentant le modèle, ses composantes et les démonstrations des deux propositions vues plus haut. Il représente une <text:span text:style-name="T50">innovation</text:span> dans le monde de la recherche car il intègre la notion de réactance dans l’utilité des agents.</text:p>
      <text:h text:style-name="P24" text:outline-level="3">Simulation numérique</text:h>
      <text:p text:style-name="P23">Plusieurs outils pourraient nous permettre de modéliser le fonctionnement de l’équation et ses limites. A l’aide d’outils de développement, il serait possible de faire des simulations dans différents contextes dans lesquels nous pourrions faire varier les facteurs qui influence<text:span text:style-name="T49">nt</text:span> la prise de décision.</text:p>
      <text:p text:style-name="P23">Ainsi, nous simul<text:span text:style-name="T49">ons</text:span> l’adoption au sein d’une population en modifiant la confiance institutionnelle des agents, la force de la politique publique ou encore le coût fixe de <text:span text:style-name="T48">cette dernière</text:span>. Cela nous permet de prouver que certains contextes et certaines politiques sont préférables en fonction de l’objectif souhaité.</text:p>
      <text:p text:style-name="P23">Pour réaliser ces simulation, nous utilisons des méthodes comme la modélisation basée sur les agents qui permet de simuler et randomiser l’hétérogénéité des agents et donc de tester le modèle sur des population fondamentalement différentes et ce, sur des grands volumes.</text:p>
      <text:p text:style-name="P23">Un deuxième article <text:span text:style-name="T49">reprend</text:span> <text:span text:style-name="T49">ces tests et </text:span>les conclusions <text:span text:style-name="T49">qui en découle</text:span>.</text:p>
      <text:h text:style-name="P24" text:outline-level="3">Expérimental</text:h>
      <text:p text:style-name="P23">Une troisième phase concerne des expérimentations <text:span text:style-name="T49">de terrain ou en laboratoire.</text:span></text:p>
      <text:p text:style-name="P23"><text:span text:style-name="T49">N</text:span>ous <text:span text:style-name="T49">observons</text:span> en quoi le framing d’une incitation entraîne des modifications dans la part d’adoption d’un groupe. En jouant sur la manière dont l’incitation est présentée mais aussi sur son aspect <text:span text:style-name="T51">forcée ou non, nous étudions le déplacement du seuil de réactance des participants. Ces expériences permettront aussi de mettre en évidence l’intérêt d’intégrer la notion de confiance institutionnelle dans le modèle pour justifier de l’importance du contexte dans la mise en place d’une politique publique.</text:span></text:p>
      <text:p text:style-name="P25"><text:soft-page-break/>Ces expériences <text:span text:style-name="T49">prennent</text:span> la forme de jeux dans lesquels nous modifions la présentation d’une demande de différente manière (le ton, le côté obligatoire, l’encouragement ou son absence, la menace, le sujet concerné, la mise en place d’un contexte etc.) </text:p>
      <text:p text:style-name="P25">Pour essayer de capter <text:span text:style-name="T52">au mieux les croyances et les convictions des participants, la mise en place de questionnaires avant ou après les expérimentations, nous permet de juger de l’impact de certaines variables sur l’adoption ou non au sein d’un groupe. Parmi ces questions, nous pouvons chercher à connaître la confiance des participants dans les institutions (ou ici l’organisateur de l’expérimentation), l’orientation politique, le besoin d’autonomie ou même la perception morale.</text:span></text:p>
      <text:p text:style-name="P26">Les différentes expérimentations et leurs résultats font l’objet du troisième et dernier artic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7T20:14:51.460000000</meta:creation-date>
    <meta:generator>LibreOffice/24.8.0.3$Windows_X86_64 LibreOffice_project/0bdf1299c94fe897b119f97f3c613e9dca6be583</meta:generator>
    <dc:date>2026-05-29T20:30:29.630000000</dc:date>
    <meta:editing-duration>PT2H10M55S</meta:editing-duration>
    <meta:editing-cycles>26</meta:editing-cycles>
    <meta:document-statistic meta:table-count="0" meta:image-count="0" meta:object-count="0" meta:page-count="5" meta:paragraph-count="56" meta:word-count="1953" meta:character-count="12891" meta:non-whitespace-character-count="10981"/>
  </office:meta>
</office:document-meta>
</file>