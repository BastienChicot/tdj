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cb8c" officeooo:paragraph-rsid="001bcb8c"/>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Horizontal_20_Line">
      <style:text-properties officeooo:paragraph-rsid="001d349e"/>
    </style:style>
    <style:style style:name="P5" style:family="paragraph" style:parent-style-name="Heading_20_2">
      <style:text-properties officeooo:paragraph-rsid="001d349e"/>
    </style:style>
    <style:style style:name="P6" style:family="paragraph" style:parent-style-name="Text_20_body">
      <style:text-properties officeooo:rsid="001d349e" officeooo:paragraph-rsid="001d349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text-properties officeooo:rsid="001d6901" officeooo:paragraph-rsid="001d6901"/>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text-properties officeooo:rsid="001d843b" officeooo:paragraph-rsid="001d843b"/>
    </style:style>
    <style:style style:name="P15" style:family="paragraph" style:parent-style-name="Text_20_body">
      <style:text-properties officeooo:paragraph-rsid="001d843b"/>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text-properties officeooo:rsid="001e3dfd" officeooo:paragraph-rsid="001e3dfd"/>
    </style:style>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T1" style:family="text">
      <style:text-properties officeooo:rsid="001d843b"/>
    </style:style>
    <style:style style:name="T2" style:family="text">
      <style:text-properties officeooo:rsid="001e3df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accination</text:h>
      <text:p text:style-name="P1">Dans le cadre des campagnes de vaccination, on pourrait s’intéresser à l’efficacité de ces dernières auprès de la population. Le sujet ici portera surtout sur le fait que ces campagnes sont menées en vue d’augmenter la qualité de vie et le bien-être de la population. On sait qu’une part de la population refuse de se vacciner qu’il s’agisse des campagnes standards autour des vaccins habituels (polio, tétanos etc.) ou des campagnes exceptionnelles comme le COVID. <text:line-break/>L’avantage de cette approche est que nous disposons d’exemples en situations réelles avec de vraies données récoltées notamment au cours de la crise COVID. Pour la part de la population réactante, nous savons que certains ont des raisons personnelles liées aux croyances ou aux convictions.</text:p>
      <text:p text:style-name="P1"/>
      <text:p text:style-name="P1">Une notion de défiance aussi peut-être relevée dans les différentes campagnes de par le fait qu’une partie des gens ne veulent plus se soumettre aux vaccins par peur ou simplement, et c’est là aussi que le sujet est intéressant, par esprit de contradiction. L’idée que la campagne soit perçue comme une directive un peu trop forte par certains agents colle parfaitement avec notre modèle. L’effet matériel, la réactance ainsi que la confiance institutionnelle sont bien représentés dans cet exemple.</text:p>
      <text:p text:style-name="Text_20_body">On observe :</text:p>
      <text:list text:style-name="L1">
        <text:list-item>
          <text:p text:style-name="P2">efficacité des campagnes ; </text:p>
        </text:list-item>
        <text:list-item>
          <text:p text:style-name="P2">mais aussi fatigue vaccinale ; </text:p>
        </text:list-item>
        <text:list-item>
          <text:p text:style-name="P2">défiance ; </text:p>
        </text:list-item>
        <text:list-item>
          <text:p text:style-name="P3">opposition identitaire. </text:p>
        </text:list-item>
      </text:list>
      <text:p text:style-name="Text_20_body"/>
      <text:p text:style-name="P4"/>
      <text:h text:style-name="P5" text:outline-level="2">🔹 Dépistage organisé</text:h>
      <text:p text:style-name="Text_20_body"/>
      <text:p text:style-name="P6">Bien qu’il est évident que ces campagnes ont pour but d’aider les gens et de les prévenir d’un risque de santé, elle ne font toujours pas l’unanimité. On pourrait se poser la question des techniques de communication, de couverture médiatique, d’accès à des structures… Et tout cela pourrait intégrer la notion de coût matériel de l’action. Que ces coûts soient supporter par l’état ou les agents, ils sont probablement la source du problème.</text:p>
      <text:p text:style-name="P6">Ces campagnes ont été rendue gratuites en France et sont de plus en plus simple à réaliser mais il existe encore des agents qui ne souhaitent pas y participer. Les coûts mentionnés plus haut sont probablement une partie de l’explication mais il est aussi possible de voir, au sein de la population, une réactance face à ces phénomènes. Parle-t-on d’un problème de confiance dans le système de santé, de croyances intrinsèques ou encore de l’indifférence.</text:p>
      <text:p text:style-name="P6">Le modèle proposerait une approche originale du problème et expliquerait une partie des freins au travers des variables de coût ou la réactance des agents. Nous pourrions mener ces exemples sur des campagnes concrètes réalisées en région ou au national et ce, sur divers sujets comme le papillomavirus, le cancer du sein, le cancer colorectal etc...</text:p>
      <text:p text:style-name="Text_20_body"><text:soft-page-break/>Ex :</text:p>
      <text:list text:style-name="L2">
        <text:list-item>
          <text:p text:style-name="P7">cancer colorectal ; </text:p>
        </text:list-item>
        <text:list-item>
          <text:p text:style-name="P7">sein ; </text:p>
        </text:list-item>
        <text:list-item>
          <text:p text:style-name="P8">HPV. </text:p>
        </text:list-item>
      </text:list>
      <text:p text:style-name="Text_20_body"/>
      <text:p text:style-name="Horizontal_20_Line"/>
      <text:h text:style-name="Heading_20_2" text:outline-level="2">🔹 Prévention nutritionnelle</text:h>
      <text:p text:style-name="Text_20_body"/>
      <text:p text:style-name="P6">En ARS, le sujet de l’alimentation fait l’objet d’une organisation territoriale et d’une communication qui vise à sensibiliser les gens sur leur propre consommation. L’objectif final est bienveillant puisqu’il vise à améliorer la qualité de vie des agents en diminuant les risques de maladies et l’obésité que provoque la malnutrition.</text:p>
      <text:p text:style-name="P6">Si des campagnes sont mises en place comme dans le cadre des dépistages, ici, on va aussi parler des éléments de communication rendu presque obligatoire sur le territoire comme le nutri-score ou l’interdiction à la vente de certains produits (ex : mountain dew).</text:p>
      <text:p text:style-name="P6">Il est possible d’identifier certains freins matériels et monétaires autour de l’alimentation saine notamment avec le prix des produits bio qui sont en moyenne, plus cher que les autres. Mais notre modèle pourrait mettre en avant un autre phénomène intéressant, celui de l’image que renvoi les gens. Nous croyons qu’il existe une part de la population qui refuse d’adapter leur régime car cela ne correspond pas à l’image qu’ils veulent donner. Par exemple, il est commun en France de catégoriser quelqu’un de bon vivant s’il aime la viande rouge, l’alcool, les apéritif etc.</text:p>
      <text:p text:style-name="P6">C’est un sujet intéressant car il ne comprends pas qu’une campagne de communication mais de vrais outils comme le nutri-score. L’approche par les coûts est à prendre en compte mais c’est cet aspect « réactance liée à l’image » qui semble être le petit plus de ce sujet.</text:p>
      <text:p text:style-name="Text_20_body">Nutri-Score :</text:p>
      <text:list text:style-name="L3">
        <text:list-item>
          <text:p text:style-name="P9">certains suivent ; </text:p>
        </text:list-item>
        <text:list-item>
          <text:p text:style-name="P9">d’autres rejettent ; </text:p>
        </text:list-item>
        <text:list-item>
          <text:p text:style-name="P10">parfois par opposition symbolique. </text:p>
        </text:list-item>
      </text:list>
      <text:p text:style-name="Horizontal_20_Line"/>
      <text:h text:style-name="Heading_20_2" text:outline-level="2">🔹 Don d’organes</text:h>
      <text:p text:style-name="P11">En France, nous sommes tous donneur d’organes par défaut et cela depuis plus de 10 ans. Là où, auparavant, nous devions nous déclarer donneur, la loi a changé face au nombre de personnes indifférentes qui ne faisait pas la démarche.</text:p>
      <text:p text:style-name="P11">Dans un premier temps, nous avons l’exemple parfait d’un coût immatériel comme la démarche de se déclarer, qui freinait l’action alors qu’une grande majorité des gens étaient totalement indifférents face à ce sujet.</text:p>
      <text:p text:style-name="P11"><text:soft-page-break/>Mais aujourd’hui, ce que nous constatons, c’est qu’une partie des agents se déclarent non-donneurs volontairement pour des raisons qui leur sont propres. C’est à dire qu’une frange de la population est prête à supporter le coût de faire cette déclaration pour des raisons intrinsèque, afin de ne pas faire l’action (qui pourtant semble plutôt bénéfique au globale).</text:p>
      <text:p text:style-name="P11">C’est pour ces raisons que cet exemple aussi est très bon, il comporte à la fois un coût, une politique publique légère qui vient supprimer les démarches pour l’adoption mais qui ne rencontre pas l’unanimité et une part de la population qui représente bien notre distribution Gamma et qui est fermement contre l’action. Tous les éléments sont réunis, cependant, dans les débats académiques, cette loi sur le don d’organe n’est pas forcément perçue comme un nudge ou une politique publique.</text:p>
      <text:p text:style-name="Text_20_body">Excellent exemple :</text:p>
      <text:list text:style-name="L4">
        <text:list-item>
          <text:p text:style-name="P12">extrêmement connu ; </text:p>
        </text:list-item>
        <text:list-item>
          <text:p text:style-name="P12">très documenté ; </text:p>
        </text:list-item>
        <text:list-item>
          <text:p text:style-name="P13">tension autonomie / intérêt collectif parfaite. </text:p>
        </text:list-item>
      </text:list>
      <text:p text:style-name="Horizontal_20_Line"/>
      <text:h text:style-name="Heading_20_2" text:outline-level="2">🔹 Usage des urgences </text:h>
      <text:p text:style-name="Text_20_body"/>
      <text:p text:style-name="P14">Plusieurs dispositifs existent aujourd’hui pour répondre aux défis auxquels sont confronté les services d’urgence des hôpitaux. Nous avons notamment mis en place des régulation dans certains CHU dont celui de Dijon, en vue de filtrer les entrées.</text:p>
      <text:p text:style-name="P14">Des campagnes ont été menées autour des centre d’appels du 15 pour inciter les gens à passer d’abord par cette plateforme avant de se déplacer aux urgences. La télémédecine est de plus en plus accessible aux personnes qui ont besoin d’un diagnostic.</text:p>
      <text:p text:style-name="P14">Dans des analyses récentes, nous constatons une baisse tendancielle des passages aux urgences qui semblerait correspondre à une diminution des entrées pour des motifs peu graves. Nous observons aussi que la durée des passages a augmenter en moyenne. Non pas parce que ceux-ci sont traités plus lentement qu’avant mais parce que la proportion de passages « rapides » a diminué. Toutefois, cette diminution reste modeste et les services d’urgences restent en tension.</text:p>
      <text:p text:style-name="P14">Bien que ces campagnes et des politiques publiques aient été mises en place pour mieux diriger les patient, nous constatons encore trop de passages qui auraient pu être évités.</text:p>
      <text:p text:style-name="P15"><text:span text:style-name="T1">Une part de la population n’est pas sensible au problème de sur-sollicitation des urgences et continue de s’y rendre sans chercher à savoir en amont si leur symptômes font l’objet d’un besoin réel d’intervention.</text:span></text:p>
      <text:p text:style-name="P14">Dans notre modèle, nous avons la possibilité de modéliser ce phénomène pour comprendre quel élément pousse le plus les gens à ne pas prendre leurs précautions avant de se rendre aux urgences.</text:p>
      <text:p text:style-name="P14">Par exemple, le coût représente plutôt un coût d’attente et d’équipement lié au fait de devoir passer par plusieurs plateforme avant de se rendre à l’hôpital. La réactance modéliserait le sentiment qui pousse les gens à ne pas attendre, la panique ou encore les convictions des personnes qui les pousse à penser qu’ils savent ce qu’ils font parfaitement. </text:p>
      <text:p text:style-name="P14"><text:soft-page-break/>Dans cet exemple, la force de la politique publique reste assez faible (il n’y a pas d’obligation forte à passer par un centre d’appel par exemple et des patients qui ne l’ont pas fait ne seront pas laissés devant la porte des urgences). En revanche, la confiance institutionnelle est elle plus ambiguë. D’une part elle est faible dans les institutions qui conseillent la régulation mais forte pour les établissements de santé. </text:p>
      <text:p text:style-name="Text_20_body">Les politiques visant à orienter les patients :</text:p>
      <text:list text:style-name="L5">
        <text:list-item>
          <text:p text:style-name="P16">applications ; </text:p>
        </text:list-item>
        <text:list-item>
          <text:p text:style-name="P16">téléconsultation ; </text:p>
        </text:list-item>
        <text:list-item>
          <text:p text:style-name="P17">“bons comportements”. </text:p>
        </text:list-item>
      </text:list>
      <text:p text:style-name="Text_20_body">→ peuvent générer du rejet.</text:p>
      <text:p text:style-name="Horizontal_20_Line"/>
      <text:h text:style-name="Heading_20_2" text:outline-level="2">🔹 Santé numérique</text:h>
      <text:p text:style-name="Text_20_body">Sujet très actuel <text:span text:style-name="T2">qui permettrait d’aborder le coût de l’équipement notamment.</text:span></text:p>
      <text:p text:style-name="P18">La réactance peut se traduire de différentes manières : le patient n’a pas confiance dans un médecin qu’il ne connaît pas ou le patient ne souhaite pas s’équiper d’un ordinateur ou d’une webcam juste pour ça (s’il n’en a pas déjà).</text:p>
      <text:p text:style-name="P18">Des grandes campagnes sont en cours partout en France sur plusieurs axes de la santé numérique. Il existe des campagnes qui promeuvent la télémédecine, d’autre qui incite à l’utilisation du dossier médical partagé.</text:p>
      <text:p text:style-name="P18">La plupart des plateforme de santé sont en ligne et chaque patient peut ajouter ce qu’il souhaite à son dossier. Cependant, cela représente un coût, celui de tenir à jour son dossier avec ses informations et ses résultats de santé.</text:p>
      <text:p text:style-name="P18">Nous avons ici, identifié plusieurs points : les coûts matériels, les coûts immatériels et des raisons de le réactance. Pour la confiance institutionnelle, elle pourrait se traduire par la confiance donnée par les agents aux campagnes de communication et l’attention qui leur est portée mais aussi au travers de la confiance dans les application en ligne recensant les documents personnels des agents sur leur santé.</text:p>
      <text:p text:style-name="Text_20_body">Ex :</text:p>
      <text:list text:style-name="L6">
        <text:list-item>
          <text:p text:style-name="P19">Mon espace santé ; </text:p>
        </text:list-item>
        <text:list-item>
          <text:p text:style-name="P19">dossiers médicaux numériques ; </text:p>
        </text:list-item>
        <text:list-item>
          <text:p text:style-name="P20">partage de données. </text:p>
        </text:list-item>
      </text:list>
      <text:p text:style-name="Text_20_body"><text:span text:style-name="T2">Le</text:span> modèle peut expliquer :</text:p>
      <text:list text:style-name="L7">
        <text:list-item>
          <text:p text:style-name="P21">adoption ; </text:p>
        </text:list-item>
        <text:list-item>
          <text:p text:style-name="P21">défiance ; </text:p>
        </text:list-item>
        <text:list-item>
          <text:p text:style-name="P22">perception de surveillance. </text:p>
        </text:list-item>
      </text:list>
      <text:p text:style-name="Text_20_body">Très bon angle régio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7T20:19:30.839000000</meta:creation-date>
    <dc:date>2026-06-10T17:41:16.098000000</dc:date>
    <meta:editing-duration>PT1H10M10S</meta:editing-duration>
    <meta:editing-cycles>6</meta:editing-cycles>
    <meta:generator>LibreOffice/24.8.0.3$Windows_X86_64 LibreOffice_project/0bdf1299c94fe897b119f97f3c613e9dca6be583</meta:generator>
    <meta:document-statistic meta:table-count="0" meta:image-count="0" meta:object-count="0" meta:page-count="4" meta:paragraph-count="63" meta:word-count="1550" meta:character-count="9504" meta:non-whitespace-character-count="8013"/>
  </office:meta>
</office:document-meta>
</file>