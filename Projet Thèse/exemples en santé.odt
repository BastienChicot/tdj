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Vaccination</text:h>
      <text:p text:style-name="Text_20_body">Cas parfait.</text:p>
      <text:p text:style-name="Text_20_body">On observe :</text:p>
      <text:list text:style-name="L1">
        <text:list-item>
          <text:p text:style-name="P1">efficacité des campagnes ; </text:p>
        </text:list-item>
        <text:list-item>
          <text:p text:style-name="P1">mais aussi fatigue vaccinale ; </text:p>
        </text:list-item>
        <text:list-item>
          <text:p text:style-name="P1">défiance ; </text:p>
        </text:list-item>
        <text:list-item>
          <text:p text:style-name="P2">opposition identitaire. </text:p>
        </text:list-item>
      </text:list>
      <text:p text:style-name="Text_20_body">Ton modèle colle très bien :</text:p>
      <text:list text:style-name="L2">
        <text:list-item>
          <text:p text:style-name="P3">effet matériel ; </text:p>
        </text:list-item>
        <text:list-item>
          <text:p text:style-name="P3">réactance ; </text:p>
        </text:list-item>
        <text:list-item>
          <text:p text:style-name="P4">confiance institutionnelle. </text:p>
        </text:list-item>
      </text:list>
      <text:p text:style-name="Horizontal_20_Line"/>
      <text:h text:style-name="Heading_20_2" text:outline-level="2">🔹 Dépistage organisé</text:h>
      <text:p text:style-name="Text_20_body">Ex :</text:p>
      <text:list text:style-name="L3">
        <text:list-item>
          <text:p text:style-name="P5">cancer colorectal ; </text:p>
        </text:list-item>
        <text:list-item>
          <text:p text:style-name="P5">sein ; </text:p>
        </text:list-item>
        <text:list-item>
          <text:p text:style-name="P6">HPV. </text:p>
        </text:list-item>
      </text:list>
      <text:p text:style-name="Text_20_body">Pourquoi certaines populations refusent malgré la gratuité et la simplification ?</text:p>
      <text:p text:style-name="Text_20_body">Très bon sujet.</text:p>
      <text:p text:style-name="Horizontal_20_Line"/>
      <text:h text:style-name="Heading_20_2" text:outline-level="2">🔹 Prévention nutritionnelle</text:h>
      <text:p text:style-name="Text_20_body">Nutri-Score :</text:p>
      <text:list text:style-name="L4">
        <text:list-item>
          <text:p text:style-name="P7">certains suivent ; </text:p>
        </text:list-item>
        <text:list-item>
          <text:p text:style-name="P7">d’autres rejettent ; </text:p>
        </text:list-item>
        <text:list-item>
          <text:p text:style-name="P8">parfois par opposition symbolique. </text:p>
        </text:list-item>
      </text:list>
      <text:p text:style-name="Horizontal_20_Line"/>
      <text:h text:style-name="Heading_20_2" text:outline-level="2">🔹 Don d’organes</text:h>
      <text:p text:style-name="Text_20_body">Excellent exemple :</text:p>
      <text:list text:style-name="L5">
        <text:list-item>
          <text:p text:style-name="P9">extrêmement connu ; </text:p>
        </text:list-item>
        <text:list-item>
          <text:p text:style-name="P9">très documenté ; </text:p>
        </text:list-item>
        <text:list-item>
          <text:p text:style-name="P10">tension autonomie / intérêt collectif parfaite. </text:p>
        </text:list-item>
      </text:list>
      <text:p text:style-name="Horizontal_20_Line"/>
      <text:h text:style-name="Heading_20_2" text:outline-level="2"><text:soft-page-break/>🔹 Usage des urgences / parcours de soins</text:h>
      <text:p text:style-name="Text_20_body">Les politiques visant à orienter les patients :</text:p>
      <text:list text:style-name="L6">
        <text:list-item>
          <text:p text:style-name="P11">applications ; </text:p>
        </text:list-item>
        <text:list-item>
          <text:p text:style-name="P11">téléconsultation ; </text:p>
        </text:list-item>
        <text:list-item>
          <text:p text:style-name="P12">“bons comportements”. </text:p>
        </text:list-item>
      </text:list>
      <text:p text:style-name="Text_20_body">→ peuvent générer du rejet.</text:p>
      <text:p text:style-name="Horizontal_20_Line"/>
      <text:h text:style-name="Heading_20_2" text:outline-level="2">🔹 Santé numérique</text:h>
      <text:p text:style-name="Text_20_body">Sujet très actuel.</text:p>
      <text:p text:style-name="Text_20_body">Ex :</text:p>
      <text:list text:style-name="L7">
        <text:list-item>
          <text:p text:style-name="P13">Mon espace santé ; </text:p>
        </text:list-item>
        <text:list-item>
          <text:p text:style-name="P13">dossiers médicaux numériques ; </text:p>
        </text:list-item>
        <text:list-item>
          <text:p text:style-name="P14">partage de données. </text:p>
        </text:list-item>
      </text:list>
      <text:p text:style-name="Text_20_body">Ton modèle peut expliquer :</text:p>
      <text:list text:style-name="L8">
        <text:list-item>
          <text:p text:style-name="P15">adoption ; </text:p>
        </text:list-item>
        <text:list-item>
          <text:p text:style-name="P15">défiance ; </text:p>
        </text:list-item>
        <text:list-item>
          <text:p text:style-name="P16">perception de surveillance. </text:p>
        </text:list-item>
      </text:list>
      <text:p text:style-name="Text_20_body">Très bon angle régiona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7T20:19:30.839000000</meta:creation-date>
    <dc:date>2026-05-27T20:19:45.547000000</dc:date>
    <meta:editing-duration>PT14S</meta:editing-duration>
    <meta:editing-cycles>1</meta:editing-cycles>
    <meta:document-statistic meta:table-count="0" meta:image-count="0" meta:object-count="0" meta:page-count="2" meta:paragraph-count="45" meta:word-count="177" meta:character-count="1004" meta:non-whitespace-character-count="872"/>
    <meta:generator>LibreOffice/24.8.0.3$Windows_X86_64 LibreOffice_project/0bdf1299c94fe897b119f97f3c613e9dca6be583</meta:generator>
  </office:meta>
</office:document-meta>
</file>