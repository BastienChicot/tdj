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cb8c" officeooo:paragraph-rsid="001bcb8c"/>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Vaccination</text:h>
      <text:p text:style-name="P1">Dans le cadre des campagnes de vaccination, on pourrait s’intéresser à l’efficacité de ces dernières auprès de la population. Le sujet ici portera surtout sur le fait que ces campagnes sont menées en vue d’augmenter la qualité de vie et le bien-être de la population. On sait qu’une part de la population refuse de se vacciner qu’il s’agisse des campagnes standards autour des vaccins habituels (polio, tétanos etc.) ou des campagnes exceptionnelles comme le COVID. <text:line-break/>L’avantage de cette approche est que nous disposons d’exemples en situations réelles avec de vraies données récoltées notamment au cours de la crise COVID. Pour la part de la population réactante, nous savons que certains ont des raisons personnelles liées aux croyances ou aux convictions.</text:p>
      <text:p text:style-name="P1"/>
      <text:p text:style-name="P1">Une notion de défiance aussi peut-être relevée dans les différentes campagnes de par le fait qu’une partie des gens ne veulent plus se soumettre aux vaccins par peur ou simplement, et c’est là aussi que le sujet est intéressant, par esprit de contradiction. L’idée que la campagne soit perçue comme une directive un peu trop forte par certains agents colle parfaitement avec notre modèle. L’effet matériel, la réactance ainsi que la confiance institutionnelle sont bien représentés dans cet exemple.</text:p>
      <text:p text:style-name="Text_20_body">On observe :</text:p>
      <text:list text:style-name="L1">
        <text:list-item>
          <text:p text:style-name="P2">efficacité des campagnes ; </text:p>
        </text:list-item>
        <text:list-item>
          <text:p text:style-name="P2">mais aussi fatigue vaccinale ; </text:p>
        </text:list-item>
        <text:list-item>
          <text:p text:style-name="P2">défiance ; </text:p>
        </text:list-item>
        <text:list-item>
          <text:p text:style-name="P3">opposition identitaire. </text:p>
        </text:list-item>
      </text:list>
      <text:p text:style-name="Text_20_body"/>
      <text:h text:style-name="Heading_20_2" text:outline-level="2">🔹 Dépistage organisé</text:h>
      <text:p text:style-name="Text_20_body">Ex :</text:p>
      <text:list text:style-name="L2">
        <text:list-item>
          <text:p text:style-name="P4">cancer colorectal ; </text:p>
        </text:list-item>
        <text:list-item>
          <text:p text:style-name="P4">sein ; </text:p>
        </text:list-item>
        <text:list-item>
          <text:p text:style-name="P5">HPV. </text:p>
        </text:list-item>
      </text:list>
      <text:p text:style-name="Text_20_body">Pourquoi certaines populations refusent malgré la gratuité et la simplification ?</text:p>
      <text:p text:style-name="Text_20_body">Très bon sujet.</text:p>
      <text:p text:style-name="Horizontal_20_Line"/>
      <text:h text:style-name="Heading_20_2" text:outline-level="2">🔹 Prévention nutritionnelle</text:h>
      <text:p text:style-name="Text_20_body">Nutri-Score :</text:p>
      <text:list text:style-name="L3">
        <text:list-item>
          <text:p text:style-name="P6">certains suivent ; </text:p>
        </text:list-item>
        <text:list-item>
          <text:p text:style-name="P6">d’autres rejettent ; </text:p>
        </text:list-item>
        <text:list-item>
          <text:p text:style-name="P7">parfois par opposition symbolique. </text:p>
        </text:list-item>
      </text:list>
      <text:p text:style-name="Horizontal_20_Line"/>
      <text:h text:style-name="Heading_20_2" text:outline-level="2"><text:soft-page-break/>🔹 Don d’organes</text:h>
      <text:p text:style-name="Text_20_body">Excellent exemple :</text:p>
      <text:list text:style-name="L4">
        <text:list-item>
          <text:p text:style-name="P8">extrêmement connu ; </text:p>
        </text:list-item>
        <text:list-item>
          <text:p text:style-name="P8">très documenté ; </text:p>
        </text:list-item>
        <text:list-item>
          <text:p text:style-name="P9">tension autonomie / intérêt collectif parfaite. </text:p>
        </text:list-item>
      </text:list>
      <text:p text:style-name="Horizontal_20_Line"/>
      <text:h text:style-name="Heading_20_2" text:outline-level="2">🔹 Usage des urgences / parcours de soins</text:h>
      <text:p text:style-name="Text_20_body">Les politiques visant à orienter les patients :</text:p>
      <text:list text:style-name="L5">
        <text:list-item>
          <text:p text:style-name="P10">applications ; </text:p>
        </text:list-item>
        <text:list-item>
          <text:p text:style-name="P10">téléconsultation ; </text:p>
        </text:list-item>
        <text:list-item>
          <text:p text:style-name="P11">“bons comportements”. </text:p>
        </text:list-item>
      </text:list>
      <text:p text:style-name="Text_20_body">→ peuvent générer du rejet.</text:p>
      <text:p text:style-name="Horizontal_20_Line"/>
      <text:h text:style-name="Heading_20_2" text:outline-level="2">🔹 Santé numérique</text:h>
      <text:p text:style-name="Text_20_body">Sujet très actuel.</text:p>
      <text:p text:style-name="Text_20_body">Ex :</text:p>
      <text:list text:style-name="L6">
        <text:list-item>
          <text:p text:style-name="P12">Mon espace santé ; </text:p>
        </text:list-item>
        <text:list-item>
          <text:p text:style-name="P12">dossiers médicaux numériques ; </text:p>
        </text:list-item>
        <text:list-item>
          <text:p text:style-name="P13">partage de données. </text:p>
        </text:list-item>
      </text:list>
      <text:p text:style-name="Text_20_body">Ton modèle peut expliquer :</text:p>
      <text:list text:style-name="L7">
        <text:list-item>
          <text:p text:style-name="P14">adoption ; </text:p>
        </text:list-item>
        <text:list-item>
          <text:p text:style-name="P14">défiance ; </text:p>
        </text:list-item>
        <text:list-item>
          <text:p text:style-name="P15">perception de surveillance. </text:p>
        </text:list-item>
      </text:list>
      <text:p text:style-name="Text_20_body">Très bon angle régiona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27T20:19:30.839000000</meta:creation-date>
    <dc:date>2026-06-08T17:35:08.545000000</dc:date>
    <meta:editing-duration>PT32M30S</meta:editing-duration>
    <meta:editing-cycles>2</meta:editing-cycles>
    <meta:generator>LibreOffice/24.8.0.3$Windows_X86_64 LibreOffice_project/0bdf1299c94fe897b119f97f3c613e9dca6be583</meta:generator>
    <meta:document-statistic meta:table-count="0" meta:image-count="0" meta:object-count="0" meta:page-count="2" meta:paragraph-count="42" meta:word-count="358" meta:character-count="2160" meta:non-whitespace-character-count="1843"/>
  </office:meta>
</office:document-meta>
</file>